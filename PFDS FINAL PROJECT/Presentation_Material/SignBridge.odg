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D0000029971D85552222970C0.jpg" manifest:media-type="image/jpeg"/>
  <manifest:file-entry manifest:full-path="Pictures/10000000000001CE000001CC664AE7042EE2097B.jpg" manifest:media-type="image/jpeg"/>
  <manifest:file-entry manifest:full-path="Pictures/100000010000010000000100A72F35CF43381946.png" manifest:media-type="image/png"/>
  <manifest:file-entry manifest:full-path="Pictures/100000000000029B00000279FE9E6F667FE6D7AA.jpg" manifest:media-type="image/jpeg"/>
  <manifest:file-entry manifest:full-path="Pictures/10000000000003820000036CCE2AF61543481DA5.jpg" manifest:media-type="image/jpeg"/>
  <manifest:file-entry manifest:full-path="Pictures/100000010000010000000100073074011DF58DD7.png" manifest:media-type="image/png"/>
  <manifest:file-entry manifest:full-path="Pictures/1000000000000200000001C3D031C89912A234B8.jpg" manifest:media-type="image/jpeg"/>
  <manifest:file-entry manifest:full-path="Pictures/100000010000010000000100DBA4DC62E955C13A.png" manifest:media-type="image/png"/>
  <manifest:file-entry manifest:full-path="Pictures/10000000000002780000027BF0080E4229D9A3D7.jpg" manifest:media-type="image/jpeg"/>
  <manifest:file-entry manifest:full-path="Pictures/1000000100000100000001001BEA9AC4B4DEA0F2.png" manifest:media-type="image/png"/>
  <manifest:file-entry manifest:full-path="Pictures/10000001000001000000010020B0CF70A218AEDC.png" manifest:media-type="image/png"/>
  <manifest:file-entry manifest:full-path="Pictures/10000000000002BE000002CA790931A18D1D579F.jpg" manifest:media-type="image/jpeg"/>
  <manifest:file-entry manifest:full-path="Pictures/100000000000028E000002ACAA792C29207240C5.jpg" manifest:media-type="image/jpeg"/>
  <manifest:file-entry manifest:full-path="Pictures/100000010000010000000100DE33E79CDFD336EF.png" manifest:media-type="image/png"/>
  <manifest:file-entry manifest:full-path="Pictures/1000000000000174000002215C283EC0689E2777.jpg" manifest:media-type="image/jpeg"/>
  <manifest:file-entry manifest:full-path="Pictures/100000010000010000000100720426F89F398869.png" manifest:media-type="image/png"/>
  <manifest:file-entry manifest:full-path="Pictures/10000000000003B2000003BE8D5004588A237BD9.jpg" manifest:media-type="image/jpeg"/>
  <manifest:file-entry manifest:full-path="Pictures/100000010000010000000100E9F08B06D7659463.png" manifest:media-type="image/png"/>
  <manifest:file-entry manifest:full-path="Pictures/10000000000001C2000001EBA6740070689044A6.jpg" manifest:media-type="image/jpeg"/>
  <manifest:file-entry manifest:full-path="Pictures/10000001000001000000010005BB05410D8F51F6.png" manifest:media-type="image/png"/>
  <manifest:file-entry manifest:full-path="Pictures/10000001000001000000010010E334B4FEFCDDCA.png" manifest:media-type="image/png"/>
  <manifest:file-entry manifest:full-path="Pictures/10000000000004140000040C5592D3A5349FB802.jpg" manifest:media-type="image/jpeg"/>
  <manifest:file-entry manifest:full-path="Pictures/100000000000016F000002031DF362C208BFD045.jpg" manifest:media-type="image/jpeg"/>
  <manifest:file-entry manifest:full-path="Pictures/10000000000000BC00000110BCB67A15C9848ADB.jpg" manifest:media-type="image/jpeg"/>
  <manifest:file-entry manifest:full-path="Pictures/10000000000001F6000002036634A8258C25350D.jpg" manifest:media-type="image/jpeg"/>
  <manifest:file-entry manifest:full-path="Pictures/10000000000000BA000001034D1FE0EDDA919A71.jpg" manifest:media-type="image/jpeg"/>
  <manifest:file-entry manifest:full-path="Pictures/10000000000001C800000205A160B2CD4C39153B.jpg" manifest:media-type="image/jpeg"/>
  <manifest:file-entry manifest:full-path="Pictures/1000000000000170000002038FF20AD697CE3F91.jpg" manifest:media-type="image/jpeg"/>
  <manifest:file-entry manifest:full-path="Pictures/10000000000000C300000112BAB1E9AB3F08DFF7.jpg" manifest:media-type="image/jpeg"/>
  <manifest:file-entry manifest:full-path="Pictures/10000001000001000000010070394E3BB4278C0C.png" manifest:media-type="image/png"/>
  <manifest:file-entry manifest:full-path="Pictures/10000000000001BF000001DD899A589098B3111C.jpg" manifest:media-type="image/jpeg"/>
  <manifest:file-entry manifest:full-path="Pictures/10000000000002AE0000029BBEAFE2A873AE4915.jpg" manifest:media-type="image/jpeg"/>
  <manifest:file-entry manifest:full-path="Pictures/1000000000000293000002A820B346795D3D368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0d1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0f4f8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1a1a2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18%" loext:shadow-blur="0.282cm"/>
    </style:style>
    <style:style style:name="gr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18cm" svg:stroke-color="#0f3460" svg:stroke-opacity="30%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18%" loext:shadow-blur="0.282cm"/>
    </style:style>
    <style:style style:name="gr18" style:family="graphic" style:parent-style-name="standard">
      <style:graphic-properties draw:stroke="solid" svg:stroke-width="0.035cm" svg:stroke-color="#e94560" draw:stroke-linejoin="round" draw:fill="solid" draw:fill-color="#e94560" draw:opacity="2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d4aa" draw:stroke-linejoin="round" draw:fill="solid" draw:fill-color="#00d4aa" draw:opacity="2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ffaa00" draw:stroke-linejoin="round" draw:fill="solid" draw:fill-color="#ffaa00" draw:opacity="2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11cm" svg:stroke-color="#ffffff" svg:stroke-opacity="15%" draw:stroke-linejoin="round" draw:fill="solid" draw:fill-color="#1a1a2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18%" loext:shadow-blur="0.282cm"/>
    </style:style>
    <style:style style:name="gr2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3.259cm" fo:min-width="4.833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088cm" fo:min-width="4.833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51cm" fo:min-width="4.833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751cm" fo:min-width="4.833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251cm" fo:min-width="4.833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201cm" fo:min-width="4.833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028cm" svg:stroke-color="#0f3460" draw:stroke-linejoin="round" draw:fill="solid" draw:fill-color="#0f3460" draw:opacity="1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021cm" svg:stroke-color="#a0a0b0" draw:stroke-linejoin="round" draw:fill="solid" draw:fill-color="#aadcf7" draw:opacity="1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021cm" svg:stroke-color="#64748b" draw:stroke-linejoin="round" draw:fill="solid" draw:fill-color="#64748b" draw:opacity="1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solid" svg:stroke-width="0.021cm" svg:stroke-color="#0f3460" draw:stroke-linejoin="round" draw:fill="solid" draw:fill-color="#ebf329" draw:opacity="1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21cm" svg:stroke-color="#00d4aa" draw:stroke-linejoin="round" draw:fill="solid" draw:fill-color="#00d4aa" draw:opacity="1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21cm" svg:stroke-color="#ffaa00" draw:stroke-linejoin="round" draw:fill="solid" draw:fill-color="#ffaa00" draw:opacity="1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solid" svg:stroke-width="0.021cm" svg:stroke-color="#e94560" draw:stroke-linejoin="round" draw:fill="solid" draw:fill-color="#e94560" draw:opacity="1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28cm" svg:stroke-color="#e94560" draw:stroke-linejoin="round" draw:fill="solid" draw:fill-color="#e94560" draw:opacity="1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789cm" fo:min-width="8.135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28cm" svg:stroke-color="#ffaa00" draw:stroke-linejoin="round" draw:fill="solid" draw:fill-color="#ffaa00" draw:opacity="18%" draw:textarea-vertical-align="top" draw:auto-grow-height="false" fo:min-height="0.607cm" fo:min-width="2.866cm" fo:padding-top="0.125cm" fo:padding-bottom="0.125cm" fo:padding-left="0.25cm" fo:padding-right="0.25cm" fo:wrap-option="wrap"/>
    </style:style>
    <style:style style:name="gr67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1.03cm" fo:min-width="2.501cm" fo:padding-top="0cm" fo:padding-bottom="0cm" fo:padding-left="0cm" fo:padding-right="0cm" fo:wrap-option="wrap"/>
      <style:paragraph-properties style:writing-mode="lr-tb"/>
    </style:style>
    <style:style style:name="gr68" style:family="graphic" style:parent-style-name="standard">
      <style:graphic-properties draw:stroke="solid" svg:stroke-width="0.028cm" svg:stroke-color="#ffaa00" draw:stroke-linejoin="round" draw:fill="solid" draw:fill-color="#f8fafc" draw:textarea-vertical-align="top" draw:auto-grow-height="false" fo:min-height="0cm" fo:min-width="0cm" fo:padding-top="0.125cm" fo:padding-bottom="0.125cm" fo:padding-left="0.25cm" fo:padding-right="0.25cm" fo:wrap-option="wrap" draw:shadow="visible" draw:shadow-offset-x="0.05cm" draw:shadow-offset-y="0.05cm" draw:shadow-color="#000000" draw:shadow-opacity="10%" loext:shadow-blur="0.141cm"/>
    </style:style>
    <style:style style:name="gr69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751cm" fo:min-width="2.141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751cm" fo:min-width="2.141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751cm" fo:min-width="2.141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751cm" fo:min-width="2.141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597cm" fo:min-width="1.501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597cm" fo:min-width="1.50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597cm" fo:min-width="1.501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solid" svg:stroke-width="0.021cm" svg:stroke-color="#00d4aa" draw:stroke-linejoin="round" draw:fill="solid" draw:fill-color="#00d4aa" draw:opacity="2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solid" svg:stroke-width="0.018cm" svg:stroke-color="#00d4aa" svg:stroke-opacity="40%" draw:stroke-linejoin="round" draw:fill="solid" draw:fill-color="#0d0d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solid" svg:stroke-width="0.021cm" svg:stroke-color="#ffaa00" draw:stroke-linejoin="round" draw:fill="solid" draw:fill-color="#ffaa00" draw:opacity="2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solid" svg:stroke-width="0.018cm" svg:stroke-color="#ffaa00" svg:stroke-opacity="40%" draw:stroke-linejoin="round" draw:fill="solid" draw:fill-color="#0d0d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solid" svg:stroke-width="0.021cm" svg:stroke-color="#e94560" draw:stroke-linejoin="round" draw:fill="solid" draw:fill-color="#e94560" draw:opacity="2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>
      <style:graphic-properties draw:stroke="solid" svg:stroke-width="0.018cm" svg:stroke-color="#e94560" svg:stroke-opacity="40%" draw:stroke-linejoin="round" draw:fill="solid" draw:fill-color="#0d0d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solid" svg:stroke-width="0.028cm" svg:stroke-color="#0f3460" draw:stroke-linejoin="round" draw:fill="solid" draw:fill-color="#0f3460" draw:opacity="18%" draw:textarea-vertical-align="top" draw:auto-grow-height="false" fo:min-height="0.596cm" fo:min-width="2.806cm" fo:padding-top="0.125cm" fo:padding-bottom="0.125cm" fo:padding-left="0.25cm" fo:padding-right="0.25cm" fo:wrap-option="wrap"/>
    </style:style>
    <style:style style:name="gr107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1.014cm" fo:min-width="3.555cm" fo:padding-top="0cm" fo:padding-bottom="0cm" fo:padding-left="0cm" fo:padding-right="0cm" fo:wrap-option="wrap"/>
      <style:paragraph-properties style:writing-mode="lr-tb"/>
    </style:style>
    <style:style style:name="gr108" style:family="graphic" style:parent-style-name="standard">
      <style:graphic-properties draw:stroke="solid" svg:stroke-width="0.053cm" svg:stroke-color="#0f3460" draw:stroke-linejoin="round" draw:fill="solid" draw:fill-color="#0f3460" draw:opacity="3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46cm" fo:min-width="4.001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569cm" fo:min-width="1.85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569cm" fo:min-width="3.001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solid" svg:stroke-width="0.028cm" svg:stroke-color="#00d4aa" draw:stroke-linejoin="round" draw:fill="solid" draw:fill-color="#00d4aa" draw:opacity="1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0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solid" svg:stroke-width="0.028cm" svg:stroke-color="#00d4aa" draw:stroke-linejoin="round" draw:fill="solid" draw:fill-color="#f0f4f8" draw:textarea-vertical-align="top" draw:auto-grow-height="false" fo:min-height="0cm" fo:min-width="0cm" fo:padding-top="0.125cm" fo:padding-bottom="0.125cm" fo:padding-left="0.25cm" fo:padding-right="0.25cm" fo:wrap-option="wrap" draw:shadow="visible" draw:shadow-offset-x="0.05cm" draw:shadow-offset-y="0.05cm" draw:shadow-color="#000000" draw:shadow-opacity="10%" loext:shadow-blur="0.141cm"/>
    </style:style>
    <style:style style:name="gr122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1.251cm" fo:min-width="1.874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719cm" fo:min-width="2.001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1.251cm" fo:min-width="2.494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1.251cm" fo:min-width="2.001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1.251cm" fo:min-width="2.001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1.251cm" fo:min-width="1.994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3cm, 2.384cm, 2.74cm, 1.892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8cm, 1.724cm, 2.302cm, 1.782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22cm, 1.828cm, 3.681cm, 3.12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37cm, 4.287cm, 1.13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7cm, 0.004cm, 2.445cm, 0cm)" draw:image-opacity="100%" style:mirror="none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1cm, 2.525cm, 2.561cm, 2.003cm)" draw:image-opacity="100%" style:mirror="none"/>
    </style:style>
    <style:style style:name="gr13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>
      <style:graphic-properties draw:stroke="solid" svg:stroke-width="0.021cm" svg:stroke-color="#00d4aa" draw:stroke-linejoin="round" draw:fill="solid" draw:fill-color="#00d4aa" draw:opacity="2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solid" svg:stroke-width="0.021cm" svg:stroke-color="#e94560" draw:stroke-linejoin="round" draw:fill="solid" draw:fill-color="#e94560" draw:opacity="2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1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solid" svg:stroke-width="0.021cm" svg:stroke-color="#ffaa00" draw:stroke-linejoin="round" draw:fill="solid" draw:fill-color="#ffaa00" draw:opacity="2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6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64cm" fo:min-width="9.151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922cm" fo:min-width="9.151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5" style:family="graphic" style:parent-style-name="standard">
      <style:graphic-properties draw:stroke="solid" svg:stroke-width="0.035cm" svg:stroke-color="#00d4aa" draw:stroke-linejoin="round" draw:fill="solid" draw:fill-color="#00d4a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>
      <style:graphic-properties draw:stroke="solid" svg:stroke-width="0.035cm" svg:stroke-color="#ffaa00" draw:stroke-linejoin="round" draw:fill="solid" draw:fill-color="#ffaa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0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926cm" fo:min-width="8.897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>
      <style:graphic-properties draw:stroke="solid" svg:stroke-width="0.035cm" svg:stroke-color="#0f3460" draw:stroke-linejoin="round" draw:fill="solid" draw:fill-color="#0f346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251cm" fo:min-width="8.897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251cm" fo:min-width="8.897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>
      <style:graphic-properties draw:stroke="solid" svg:stroke-width="0.035cm" svg:stroke-color="#e94560" draw:stroke-linejoin="round" draw:fill="solid" draw:fill-color="#e9456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251cm" fo:min-width="8.897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251cm" fo:min-width="8.897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solid" svg:stroke-width="0.035cm" svg:stroke-color="#00d4aa" draw:stroke-linejoin="round" draw:fill="solid" draw:fill-color="#00d4aa" draw:opacity="2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123cm" fo:min-width="5.595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093cm" fo:min-width="5.595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solid" svg:stroke-width="0.035cm" svg:stroke-color="#ffaa00" draw:stroke-linejoin="round" draw:fill="solid" draw:fill-color="#ffaa00" draw:opacity="2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6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123cm" fo:min-width="5.595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>
      <style:graphic-properties draw:stroke="solid" svg:stroke-width="0.035cm" svg:stroke-color="#e94560" draw:stroke-linejoin="round" draw:fill="solid" draw:fill-color="#e94560" draw:opacity="2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3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123cm" fo:min-width="5.595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54cm" fo:min-width="22.359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>
      <style:graphic-properties draw:stroke="solid" svg:stroke-width="0.018cm" svg:stroke-color="#0f3460" svg:stroke-opacity="30%" draw:stroke-linejoin="round" draw:fill="solid" draw:fill-color="#ffffff" draw:textarea-vertical-align="top" draw:auto-grow-height="false" fo:min-height="1.75cm" fo:min-width="22.867cm" fo:padding-top="0.125cm" fo:padding-bottom="0.125cm" fo:padding-left="0.25cm" fo:padding-right="0.25cm" fo:wrap-option="wrap" draw:shadow="visible" draw:shadow-offset-x="0.074cm" draw:shadow-offset-y="0.074cm" draw:shadow-color="#000000" draw:shadow-opacity="18%" loext:shadow-blur="0.282cm"/>
    </style:style>
    <style:style style:name="gr201" style:family="graphic" style:parent-style-name="standard">
      <style:graphic-properties draw:stroke="solid" svg:stroke-width="0.035cm" svg:stroke-color="#00d4aa" draw:stroke-linejoin="round" draw:fill="solid" draw:fill-color="#00d4aa" draw:opacity="25%" draw:textarea-vertical-align="top" draw:auto-grow-height="false" fo:min-height="0.611cm" fo:min-width="0.361cm" fo:padding-top="0.125cm" fo:padding-bottom="0.125cm" fo:padding-left="0.25cm" fo:padding-right="0.25cm" fo:wrap-option="wrap"/>
    </style:style>
    <style:style style:name="gr202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968cm" fo:min-width="0.718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751cm" fo:min-width="2.293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251cm" fo:min-width="6.103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>
      <style:graphic-properties draw:stroke="none" svg:stroke-width="0cm" draw:fill="solid" draw:fill-color="#0d0d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251cm" fo:min-width="11.494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>
      <style:graphic-properties draw:stroke="solid" svg:stroke-width="0.018cm" svg:stroke-color="#0f3460" svg:stroke-opacity="30%" draw:stroke-linejoin="round" draw:fill="solid" draw:fill-color="#ffffff" draw:textarea-vertical-align="top" draw:auto-grow-height="false" fo:min-height="2.14cm" fo:min-width="22.867cm" fo:padding-top="0.125cm" fo:padding-bottom="0.125cm" fo:padding-left="0.25cm" fo:padding-right="0.25cm" fo:wrap-option="wrap" draw:shadow="visible" draw:shadow-offset-x="0.074cm" draw:shadow-offset-y="0.074cm" draw:shadow-color="#000000" draw:shadow-opacity="18%" loext:shadow-blur="0.282cm"/>
    </style:style>
    <style:style style:name="gr20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968cm" fo:min-width="0.528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251cm" fo:min-width="2.293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1.751cm" fo:min-width="6.103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251cm" fo:min-width="7.501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968cm" fo:min-width="0.718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484cm" fo:min-width="2.293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751cm" fo:min-width="6.103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251cm" fo:min-width="5.501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968cm" fo:min-width="0.718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.984cm" fo:min-width="2.293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1.251cm" fo:min-width="6.103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146cm" fo:min-width="10.994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>
      <style:graphic-properties draw:stroke="solid" svg:stroke-width="0.021cm" svg:stroke-color="#00d4aa" draw:stroke-linejoin="round" draw:fill="solid" draw:fill-color="#00d4aa" draw:opacity="12%" draw:textarea-vertical-align="top" draw:auto-grow-height="false" fo:min-height="1.376cm" fo:min-width="22.692cm" fo:padding-top="0.125cm" fo:padding-bottom="0.125cm" fo:padding-left="0.25cm" fo:padding-right="0.25cm" fo:wrap-option="wrap"/>
    </style:style>
    <style:style style:name="gr221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751cm" fo:min-width="21.851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>
      <style:graphic-properties draw:stroke="solid" svg:stroke-width="0.018cm" svg:stroke-color="#00d4aa" svg:stroke-opacity="35%" draw:stroke-linejoin="round" draw:fill="solid" draw:fill-color="#00d4aa" draw:opacity="1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3" style:family="graphic" style:parent-style-name="standard">
      <style:graphic-properties draw:stroke="solid" svg:stroke-width="0.018cm" svg:stroke-color="#e94560" svg:stroke-opacity="35%" draw:stroke-linejoin="round" draw:fill="solid" draw:fill-color="#e94560" draw:opacity="1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solid" draw:fill-color="#1a1a2e"/>
      <style:paragraph-properties fo:text-align="start"/>
      <style:text-properties fo:font-size="18pt"/>
    </style:style>
    <style:style style:name="P5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P12" style:family="paragraph">
      <loext:graphic-properties draw:fill="solid" draw:fill-color="#e94560" draw:opacity="20%"/>
      <style:paragraph-properties fo:text-align="start"/>
      <style:text-properties fo:font-size="18pt"/>
    </style:style>
    <style:style style:name="P13" style:family="paragraph">
      <loext:graphic-properties draw:fill="solid" draw:fill-color="#00d4aa" draw:opacity="20%"/>
      <style:paragraph-properties fo:text-align="start"/>
      <style:text-properties fo:font-size="18pt"/>
    </style:style>
    <style:style style:name="P14" style:family="paragraph">
      <loext:graphic-properties draw:fill="solid" draw:fill-color="#ffaa00" draw:opacity="20%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loext:graphic-properties draw:fill="solid" draw:fill-color="#0f3460" draw:opacity="18%"/>
      <style:paragraph-properties fo:text-align="start"/>
      <style:text-properties fo:font-size="18pt"/>
    </style:style>
    <style:style style:name="P17" style:family="paragraph">
      <loext:graphic-properties draw:fill="solid" draw:fill-color="#aadcf7" draw:opacity="12%"/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end" style:writing-mode="lr-tb">
        <style:tab-stops>
          <style:tab-stop style:position="0cm"/>
        </style:tab-stops>
      </style:paragraph-properties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end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0" style:family="paragraph">
      <loext:graphic-properties draw:fill="solid" draw:fill-color="#64748b" draw:opacity="12%"/>
      <style:paragraph-properties fo:text-align="start"/>
      <style:text-properties fo:font-size="18pt"/>
    </style:style>
    <style:style style:name="P21" style:family="paragraph">
      <loext:graphic-properties draw:fill="solid" draw:fill-color="#ebf329" draw:opacity="12%"/>
      <style:paragraph-properties fo:text-align="start"/>
      <style:text-properties fo:font-size="18pt"/>
    </style:style>
    <style:style style:name="P22" style:family="paragraph">
      <loext:graphic-properties draw:fill="solid" draw:fill-color="#00d4aa" draw:opacity="12%"/>
      <style:paragraph-properties fo:text-align="start"/>
      <style:text-properties fo:font-size="18pt"/>
    </style:style>
    <style:style style:name="P23" style:family="paragraph">
      <loext:graphic-properties draw:fill="solid" draw:fill-color="#ffaa00" draw:opacity="12%"/>
      <style:paragraph-properties fo:text-align="start"/>
      <style:text-properties fo:font-size="18pt"/>
    </style:style>
    <style:style style:name="P24" style:family="paragraph">
      <loext:graphic-properties draw:fill="solid" draw:fill-color="#e94560" draw:opacity="12%"/>
      <style:paragraph-properties fo:text-align="start"/>
      <style:text-properties fo:font-size="18pt"/>
    </style:style>
    <style:style style:name="P25" style:family="paragraph">
      <loext:graphic-properties draw:fill="solid" draw:fill-color="#e94560" draw:opacity="18%"/>
      <style:paragraph-properties fo:text-align="start"/>
      <style:text-properties fo:font-size="18pt"/>
    </style:style>
    <style:style style:name="P26" style:family="paragraph">
      <loext:graphic-properties draw:fill="solid" draw:fill-color="#ffaa00" draw:opacity="18%"/>
      <style:paragraph-properties fo:text-align="start"/>
      <style:text-properties fo:font-size="18pt"/>
    </style:style>
    <style:style style:name="P27" style:family="paragraph">
      <loext:graphic-properties draw:fill="solid" draw:fill-color="#f8fafc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solid" draw:fill-color="#0d0d1a"/>
      <style:paragraph-properties fo:text-align="start"/>
      <style:text-properties fo:font-size="18pt"/>
    </style:style>
    <style:style style:name="P30" style:family="paragraph">
      <loext:graphic-properties draw:fill="solid" draw:fill-color="#0f3460" draw:opacity="30%"/>
      <style:paragraph-properties fo:text-align="start"/>
      <style:text-properties fo:font-size="18pt"/>
    </style:style>
    <style:style style:name="P31" style:family="paragraph">
      <loext:graphic-properties draw:fill="solid" draw:fill-color="#00d4aa" draw:opacity="18%"/>
      <style:paragraph-properties fo:text-align="start"/>
      <style:text-properties fo:font-size="18pt"/>
    </style:style>
    <style:style style:name="P32" style:family="paragraph">
      <loext:graphic-properties draw:fill="solid" draw:fill-color="#f0f4f8"/>
      <style:paragraph-properties fo:text-align="start"/>
      <style:text-properties fo:font-size="18pt"/>
    </style:style>
    <style:style style:name="P33" style:family="paragraph">
      <loext:graphic-properties draw:fill="solid" draw:fill-color="#00d4aa" draw:opacity="22%"/>
      <style:paragraph-properties fo:text-align="start"/>
      <style:text-properties fo:font-size="18pt"/>
    </style:style>
    <style:style style:name="P34" style:family="paragraph">
      <loext:graphic-properties draw:fill="solid" draw:fill-color="#e94560" draw:opacity="22%"/>
      <style:paragraph-properties fo:text-align="start"/>
      <style:text-properties fo:font-size="18pt"/>
    </style:style>
    <style:style style:name="P35" style:family="paragraph">
      <loext:graphic-properties draw:fill="solid" draw:fill-color="#ffaa00" draw:opacity="22%"/>
      <style:paragraph-properties fo:text-align="start"/>
      <style:text-properties fo:font-size="18pt"/>
    </style:style>
    <style:style style:name="P36" style:family="paragraph">
      <loext:graphic-properties draw:fill="solid" draw:fill-color="#00d4aa"/>
      <style:paragraph-properties fo:text-align="start"/>
      <style:text-properties fo:font-size="18pt"/>
    </style:style>
    <style:style style:name="P37" style:family="paragraph">
      <loext:graphic-properties draw:fill="solid" draw:fill-color="#ffaa00"/>
      <style:paragraph-properties fo:text-align="start"/>
      <style:text-properties fo:font-size="18pt"/>
    </style:style>
    <style:style style:name="P38" style:family="paragraph">
      <loext:graphic-properties draw:fill="solid" draw:fill-color="#0f3460"/>
      <style:paragraph-properties fo:text-align="start"/>
      <style:text-properties fo:font-size="18pt"/>
    </style:style>
    <style:style style:name="P39" style:family="paragraph">
      <loext:graphic-properties draw:fill="solid" draw:fill-color="#e94560"/>
      <style:paragraph-properties fo:text-align="start"/>
      <style:text-properties fo:font-size="18pt"/>
    </style:style>
    <style:style style:name="P40" style:family="paragraph">
      <loext:graphic-properties draw:fill="solid" draw:fill-color="#00d4aa" draw:opacity="25%"/>
      <style:paragraph-properties fo:text-align="start"/>
      <style:text-properties fo:font-size="18pt"/>
    </style:style>
    <style:style style:name="P41" style:family="paragraph">
      <loext:graphic-properties draw:fill="solid" draw:fill-color="#ffaa00" draw:opacity="25%"/>
      <style:paragraph-properties fo:text-align="start"/>
      <style:text-properties fo:font-size="18pt"/>
    </style:style>
    <style:style style:name="P42" style:family="paragraph">
      <loext:graphic-properties draw:fill="solid" draw:fill-color="#e94560" draw:opacity="25%"/>
      <style:paragraph-properties fo:text-align="start"/>
      <style:text-properties fo:font-size="18pt"/>
    </style:style>
    <style:style style:name="P43" style:family="paragraph">
      <loext:graphic-properties draw:fill="solid" draw:fill-color="#00d4aa" draw:opacity="10%"/>
      <style:paragraph-properties fo:text-align="start"/>
      <style:text-properties fo:font-size="18pt"/>
    </style:style>
    <style:style style:name="P44" style:family="paragraph">
      <loext:graphic-properties draw:fill="solid" draw:fill-color="#e94560" draw:opacity="10%"/>
      <style:paragraph-properties fo:text-align="start"/>
      <style:text-properties fo:font-size="18pt"/>
    </style:style>
    <style:style style:name="T1" style:family="text">
      <style:text-properties fo:font-variant="normal" fo:text-transform="none" fo:color="#e0e0e0" loext:opacity="100%" style:text-line-through-style="none" style:text-line-through-type="none" style:text-position="0% 100%" style:font-name="Cambria1" fo:font-size="54pt" fo:letter-spacing="normal" fo:language="en" fo:country="US" fo:font-style="normal" style:text-underline-style="none" fo:font-weight="bold" fo:background-color="transparent" style:font-name-asian="Cambria1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2" style:family="text">
      <style:text-properties fo:font-variant="normal" fo:text-transform="none" fo:color="#00d4aa" loext:opacity="100%" style:text-line-through-style="none" style:text-line-through-type="none" style:text-position="0% 100%" style:font-name="Calibri1" fo:font-size="20pt" fo:letter-spacing="normal" fo:language="en" fo:country="US" fo:font-style="italic" style:text-underline-style="none" fo:font-weight="normal" fo:background-color="transparent" style:font-name-asian="Calibri1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3" style:family="text">
      <style:text-properties fo:font-variant="normal" fo:text-transform="none" fo:color="#a0a0b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" style:family="text">
      <style:text-properties fo:font-variant="normal" fo:text-transform="none" fo:color="#00d4aa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1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5" style:family="text">
      <style:text-properties fo:font-variant="normal" fo:text-transform="none" fo:color="#a0a0b0" loext:opacity="100%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1" style:font-size-asian="9.5pt" style:font-style-asian="normal" style:font-weight-asian="normal" style:font-name-complex="DejaVu Sans2" style:font-size-complex="9.5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1e293b" loext:opacity="100%" style:text-line-through-style="none" style:text-line-through-type="none" style:text-position="0% 100%" style:font-name="Cambria1" fo:font-size="32pt" fo:letter-spacing="normal" fo:language="en" fo:country="US" fo:font-style="normal" style:text-underline-style="none" fo:font-weight="bold" fo:background-color="transparent" style:font-name-asian="Cambria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font-variant="normal" fo:text-transform="none" fo:color="#64748b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Calibri1" style:font-size-asian="13pt" style:font-style-asian="italic" style:font-weight-asian="normal" style:font-name-complex="DejaVu Sans2" style:font-size-complex="13pt" style:font-style-complex="italic" style:font-weight-complex="normal"/>
    </style:style>
    <style:style style:name="T10" style:family="text">
      <style:text-properties fo:font-variant="normal" fo:text-transform="none" fo:color="#1e293b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11" style:family="text">
      <style:text-properties fo:font-variant="normal" fo:text-transform="none" fo:color="#64748b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fo:background-color="transparent" style:font-name-asian="Calibri1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2" style:family="text">
      <style:text-properties fo:font-variant="normal" fo:text-transform="none" fo:color="#e0e0e0" loext:opacity="100%" style:text-line-through-style="none" style:text-line-through-type="none" style:text-position="0% 100%" style:font-name="Cambria1" fo:font-size="32pt" fo:letter-spacing="normal" fo:language="en" fo:country="US" fo:font-style="normal" style:text-underline-style="none" fo:font-weight="bold" fo:background-color="transparent" style:font-name-asian="Cambria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3" style:family="text">
      <style:text-properties fo:font-variant="normal" fo:text-transform="none" fo:color="#00d4aa" loext:opacity="100%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14" style:family="text">
      <style:text-properties fo:font-variant="normal" fo:text-transform="none" fo:color="#0f3460" loext:opacity="100%" style:text-line-through-style="none" style:text-line-through-type="none" style:text-position="0% 100%" style:font-name="Calibri1" fo:font-size="7.5pt" fo:letter-spacing="normal" fo:language="en" fo:country="US" fo:font-style="normal" style:text-underline-style="none" fo:font-weight="bold" fo:background-color="transparent" style:font-name-asian="DejaVu Sans2" style:font-size-asian="7.5pt" style:font-style-asian="normal" style:font-weight-asian="bold" style:font-name-complex="DejaVu Sans2" style:font-size-complex="7.5pt" style:font-style-complex="normal" style:font-weight-complex="bold"/>
    </style:style>
    <style:style style:name="T15" style:family="text">
      <style:text-properties fo:font-variant="normal" fo:text-transform="none" fo:color="#1e293b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1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6" style:family="text">
      <style:text-properties fo:font-variant="normal" fo:text-transform="none" fo:color="#1e293b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bold" fo:background-color="transparent" style:font-name-asian="Calibri1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7" style:family="text">
      <style:text-properties fo:font-variant="normal" fo:text-transform="none" fo:color="#64748b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1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8" style:family="text">
      <style:text-properties fo:font-variant="normal" fo:text-transform="none" fo:color="#e94560" loext:opacity="100%" style:text-line-through-style="none" style:text-line-through-type="none" style:text-position="0% 100%" style:font-name="Calibri1" fo:font-size="7.5pt" fo:letter-spacing="normal" fo:language="en" fo:country="US" fo:font-style="normal" style:text-underline-style="none" fo:font-weight="bold" fo:background-color="transparent" style:font-name-asian="DejaVu Sans2" style:font-size-asian="7.5pt" style:font-style-asian="normal" style:font-weight-asian="bold" style:font-name-complex="DejaVu Sans2" style:font-size-complex="7.5pt" style:font-style-complex="normal" style:font-weight-complex="bold"/>
    </style:style>
    <style:style style:name="T19" style:family="text">
      <style:text-properties fo:font-variant="normal" fo:text-transform="none" fo:color="#ffaa00" loext:opacity="100%" style:text-line-through-style="none" style:text-line-through-type="none" style:text-position="0% 100%" style:font-name="Calibri1" fo:font-size="7.5pt" fo:letter-spacing="normal" fo:language="en" fo:country="US" fo:font-style="normal" style:text-underline-style="none" fo:font-weight="bold" fo:background-color="transparent" style:font-name-asian="DejaVu Sans2" style:font-size-asian="7.5pt" style:font-style-asian="normal" style:font-weight-asian="bold" style:font-name-complex="DejaVu Sans2" style:font-size-complex="7.5pt" style:font-style-complex="normal" style:font-weight-complex="bold"/>
    </style:style>
    <style:style style:name="T20" style:family="text">
      <style:text-properties fo:font-variant="normal" fo:text-transform="none" fo:color="#1e293b" loext:opacity="100%" style:text-line-through-style="none" style:text-line-through-type="none" style:text-position="0% 100%" style:font-name="Calibri1" fo:font-size="7.5pt" fo:letter-spacing="normal" fo:language="en" fo:country="US" fo:font-style="normal" style:text-underline-style="none" fo:font-weight="normal" fo:background-color="transparent" style:font-name-asian="Calibri1" style:font-size-asian="7.5pt" style:font-style-asian="normal" style:font-weight-asian="normal" style:font-name-complex="DejaVu Sans2" style:font-size-complex="7.5pt" style:font-style-complex="normal" style:font-weight-complex="normal"/>
    </style:style>
    <style:style style:name="T21" style:family="text">
      <style:text-properties fo:font-variant="normal" fo:text-transform="none" fo:color="#00d4aa" loext:opacity="100%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1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22" style:family="text">
      <style:text-properties fo:font-variant="normal" fo:text-transform="none" fo:color="#e0e0e0" loext:opacity="100%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23" style:family="text">
      <style:text-properties fo:font-variant="normal" fo:text-transform="none" fo:color="#00d4aa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24" style:family="text">
      <style:text-properties fo:font-variant="normal" fo:text-transform="none" fo:color="#ffaa00" loext:opacity="100%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1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25" style:family="text">
      <style:text-properties fo:font-variant="normal" fo:text-transform="none" fo:color="#ffaa00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26" style:family="text">
      <style:text-properties fo:font-variant="normal" fo:text-transform="none" fo:color="#e94560" loext:opacity="100%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1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27" style:family="text">
      <style:text-properties fo:font-variant="normal" fo:text-transform="none" fo:color="#e94560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28" style:family="text">
      <style:text-properties fo:font-variant="normal" fo:text-transform="none" fo:color="#a0a0b0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fo:text-shadow="none" style:text-underline-style="none" fo:font-weight="normal" style:letter-kerning="true" fo:background-color="transparent" style:font-name-asian="Calibri1" style:font-size-asian="9.5pt" style:font-style-asian="normal" style:font-weight-asian="normal" style:font-name-complex="DejaVu San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0" style:family="text">
      <style:text-properties fo:font-variant="normal" fo:text-transform="none" fo:color="#64748b" loext:opacity="100%" style:text-line-through-style="none" style:text-line-through-type="none" style:text-position="0% 100%" style:font-name="Calibri1" fo:font-size="10pt" fo:letter-spacing="normal" fo:language="en" fo:country="US" fo:font-style="italic" style:text-underline-style="none" fo:font-weight="normal" fo:background-color="transparent" style:font-name-asian="Calibri1" style:font-size-asian="10pt" style:font-style-asian="italic" style:font-weight-asian="normal" style:font-name-complex="DejaVu Sans2" style:font-size-complex="10pt" style:font-style-complex="italic" style:font-weight-complex="normal"/>
    </style:style>
    <style:style style:name="T31" style:family="text">
      <style:text-properties fo:font-variant="normal" fo:text-transform="none" fo:color="#64748b" loext:opacity="100%" style:text-line-through-style="none" style:text-line-through-type="none" style:text-position="0% 100%" style:font-name="Calibri1" fo:font-size="11pt" fo:letter-spacing="normal" fo:language="en" fo:country="US" fo:font-style="italic" style:text-underline-style="none" fo:font-weight="normal" fo:background-color="transparent" style:font-name-asian="Calibri1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T32" style:family="text">
      <style:text-properties fo:font-variant="normal" fo:text-transform="none" fo:color="#64748b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bold" fo:background-color="transparent" style:font-name-asian="Calibri1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33" style:family="text">
      <style:text-properties fo:font-variant="normal" fo:text-transform="none" fo:color="#1e293b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fo:background-color="transparent" style:font-name-asian="Calibri1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4" style:family="text">
      <style:text-properties fo:font-variant="normal" fo:text-transform="none" fo:color="#00d4aa" loext:opacity="100%" style:text-line-through-style="none" style:text-line-through-type="none" style:text-position="0% 100%" style:font-name="Calibri1" fo:font-size="7.5pt" fo:letter-spacing="normal" fo:language="en" fo:country="US" fo:font-style="normal" style:text-underline-style="none" fo:font-weight="bold" fo:background-color="transparent" style:font-name-asian="DejaVu Sans2" style:font-size-asian="7.5pt" style:font-style-asian="normal" style:font-weight-asian="bold" style:font-name-complex="DejaVu Sans2" style:font-size-complex="7.5pt" style:font-style-complex="normal" style:font-weight-complex="bold"/>
    </style:style>
    <style:style style:name="T35" style:family="text">
      <style:text-properties fo:font-variant="normal" fo:text-transform="none" fo:color="#64748b" loext:opacity="100%" style:text-line-through-style="none" style:text-line-through-type="none" style:text-position="0% 100%" style:font-name="Calibri1" fo:font-size="7.5pt" fo:letter-spacing="normal" fo:language="en" fo:country="US" fo:font-style="normal" style:text-underline-style="none" fo:font-weight="normal" fo:background-color="transparent" style:font-name-asian="Calibri1" style:font-size-asian="7.5pt" style:font-style-asian="normal" style:font-weight-asian="normal" style:font-name-complex="DejaVu Sans2" style:font-size-complex="7.5pt" style:font-style-complex="normal" style:font-weight-complex="normal"/>
    </style:style>
    <style:style style:name="T36" style:family="text">
      <style:text-properties fo:font-variant="normal" fo:text-transform="none" fo:color="#00d4aa" loext:opacity="100%" style:text-line-through-style="none" style:text-line-through-type="none" style:text-position="0% 100%" style:font-name="Calibri1" fo:font-size="8.5pt" fo:letter-spacing="normal" fo:language="en" fo:country="US" fo:font-style="normal" style:text-underline-style="none" fo:font-weight="bold" fo:background-color="transparent" style:font-name-asian="Calibri1" style:font-size-asian="8.5pt" style:font-style-asian="normal" style:font-weight-asian="bold" style:font-name-complex="DejaVu Sans2" style:font-size-complex="8.5pt" style:font-style-complex="normal" style:font-weight-complex="bold"/>
    </style:style>
    <style:style style:name="T37" style:family="text">
      <style:text-properties fo:font-variant="normal" fo:text-transform="none" fo:color="#e0e0e0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38" style:family="text">
      <style:text-properties fo:font-variant="normal" fo:text-transform="none" fo:color="#e94560" loext:opacity="100%" style:text-line-through-style="none" style:text-line-through-type="none" style:text-position="0% 100%" style:font-name="Calibri1" fo:font-size="8.5pt" fo:letter-spacing="normal" fo:language="en" fo:country="US" fo:font-style="normal" style:text-underline-style="none" fo:font-weight="bold" fo:background-color="transparent" style:font-name-asian="Calibri1" style:font-size-asian="8.5pt" style:font-style-asian="normal" style:font-weight-asian="bold" style:font-name-complex="DejaVu Sans2" style:font-size-complex="8.5pt" style:font-style-complex="normal" style:font-weight-complex="bold"/>
    </style:style>
    <style:style style:name="T39" style:family="text">
      <style:text-properties fo:font-variant="normal" fo:text-transform="none" fo:color="#ffaa00" loext:opacity="100%" style:text-line-through-style="none" style:text-line-through-type="none" style:text-position="0% 100%" style:font-name="Calibri1" fo:font-size="8.5pt" fo:letter-spacing="normal" fo:language="en" fo:country="US" fo:font-style="normal" style:text-underline-style="none" fo:font-weight="bold" fo:background-color="transparent" style:font-name-asian="Calibri1" style:font-size-asian="8.5pt" style:font-style-asian="normal" style:font-weight-asian="bold" style:font-name-complex="DejaVu Sans2" style:font-size-complex="8.5pt" style:font-style-complex="normal" style:font-weight-complex="bold"/>
    </style:style>
    <style:style style:name="T40" style:family="text">
      <style:text-properties fo:font-variant="normal" fo:text-transform="none" fo:color="#1e293b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1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41" style:family="text">
      <style:text-properties fo:font-variant="normal" fo:text-transform="none" fo:color="#00d4aa" loext:opacity="100%" style:text-line-through-style="none" style:text-line-through-type="none" style:text-position="0% 100%" style:font-name="Cambria1" fo:font-size="14pt" fo:letter-spacing="normal" fo:language="en" fo:country="US" fo:font-style="normal" style:text-underline-style="none" fo:font-weight="bold" fo:background-color="transparent" style:font-name-asian="Cambria1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2" style:family="text">
      <style:text-properties fo:font-variant="normal" fo:text-transform="none" fo:color="#e0e0e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43" style:family="text">
      <style:text-properties fo:font-variant="normal" fo:text-transform="none" fo:color="#ffaa00" loext:opacity="100%" style:text-line-through-style="none" style:text-line-through-type="none" style:text-position="0% 100%" style:font-name="Cambria1" fo:font-size="14pt" fo:letter-spacing="normal" fo:language="en" fo:country="US" fo:font-style="normal" style:text-underline-style="none" fo:font-weight="bold" fo:background-color="transparent" style:font-name-asian="Cambria1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4" style:family="text">
      <style:text-properties fo:font-variant="normal" fo:text-transform="none" fo:color="#e94560" loext:opacity="100%" style:text-line-through-style="none" style:text-line-through-type="none" style:text-position="0% 100%" style:font-name="Cambria1" fo:font-size="14pt" fo:letter-spacing="normal" fo:language="en" fo:country="US" fo:font-style="normal" style:text-underline-style="none" fo:font-weight="bold" fo:background-color="transparent" style:font-name-asian="Cambria1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5" style:family="text">
      <style:text-properties fo:font-variant="normal" fo:text-transform="none" fo:color="#0f3460" loext:opacity="100%" style:text-line-through-style="none" style:text-line-through-type="none" style:text-position="0% 100%" style:font-name="Cambria1" fo:font-size="14pt" fo:letter-spacing="normal" fo:language="en" fo:country="US" fo:font-style="normal" style:text-underline-style="none" fo:font-weight="bold" fo:background-color="transparent" style:font-name-asian="Cambria1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6" style:family="text">
      <style:text-properties fo:font-variant="normal" fo:text-transform="none" fo:color="#1e293b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name-asian="Calibri1" style:font-size-asian="11pt" style:font-style-asian="normal" style:font-weight-asian="bold" style:font-name-complex="DejaVu Sans2" style:font-size-complex="11pt" style:font-style-complex="normal" style:font-weight-complex="bold"/>
    </style:style>
    <style:style style:name="T47" style:family="text">
      <style:text-properties fo:font-variant="normal" fo:text-transform="none" fo:color="#64748b" loext:opacity="100%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Calibri1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48" style:family="text">
      <style:text-properties fo:font-variant="normal" fo:text-transform="none" fo:color="#00d4aa" loext:opacity="100%" style:text-line-through-style="none" style:text-line-through-type="none" style:text-position="0% 100%" style:font-name="Courier New" fo:font-size="11pt" fo:letter-spacing="normal" fo:language="en" fo:country="US" fo:font-style="normal" style:text-underline-style="none" fo:font-weight="normal" fo:background-color="transparent" style:font-name-asian="Courier New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49" style:family="text">
      <style:text-properties fo:font-variant="normal" fo:text-transform="none" fo:color="#0f3460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fo:background-color="transparent" style:font-name-asian="Calibri1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T50" style:family="text">
      <style:text-properties fo:font-variant="normal" fo:text-transform="none" fo:color="#e0e0e0" loext:opacity="100%" style:text-line-through-style="none" style:text-line-through-type="none" style:text-position="0% 100%" style:font-name="Cambria1" fo:font-size="48pt" fo:letter-spacing="normal" fo:language="en" fo:country="US" fo:font-style="normal" style:text-underline-style="none" fo:font-weight="bold" fo:background-color="transparent" style:font-name-asian="Cambria1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51" style:family="text">
      <style:text-properties fo:font-variant="normal" fo:text-transform="none" fo:color="#00d4aa" loext:opacity="100%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fo:background-color="transparent" style:font-name-asian="Calibri1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52" style:family="text">
      <style:text-properties fo:font-variant="normal" fo:text-transform="none" fo:color="#00d4aa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3" style:family="text">
      <style:text-properties fo:font-variant="normal" fo:text-transform="none" fo:color="#a0a0b0" loext:opacity="100%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Calibri1" style:font-size-asian="9pt" style:font-style-asian="normal" style:font-weight-asian="normal" style:font-name-complex="DejaVu Sans2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0e0e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d4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a0a0b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e29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f3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e945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aa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 0" draw:style-name="gr1" draw:text-style-name="P1" draw:layer="layout" svg:width="4.062cm" svg:height="4.062cm" svg:x="10.668cm" svg:y="2.54cm">
          <draw:image xlink:href="Pictures/10000001000001000000010070394E3BB4278C0C.png" xlink:type="simple" xlink:show="embed" xlink:actuate="onLoad" draw:mime-type="image/png">
            <text:p/>
          </draw:image>
          <svg:desc>preencoded.png</svg:desc>
        </draw:frame>
        <draw:custom-shape draw:name="Text 2" draw:style-name="gr2" draw:text-style-name="P3" draw:layer="layout" svg:width="22.35cm" svg:height="3.046cm" svg:x="1.524cm" svg:y="3.81cm">
          <text:p text:style-name="P2"><text:span text:style-name="T1">SignBrid</text:span><text:span text:style-name="T1">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" draw:text-style-name="P3" draw:layer="layout" svg:width="22.35cm" svg:height="1.395cm" svg:x="1.524cm" svg:y="6.858cm">
          <text:p text:style-name="P2"><text:span text:style-name="T2">Gamified </text:span><text:span text:style-name="T2">ASL </text:span><text:span text:style-name="T2">Learning </text:span><text:span text:style-name="T2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" draw:text-style-name="P3" draw:layer="layout" svg:width="20.318cm" svg:height="1.014cm" svg:x="2.54cm" svg:y="8.636cm">
          <text:p text:style-name="P2"><text:span text:style-name="T3">Real-time sign recognition ---- Urdu &amp; English TTS ---- Duolingo-style XP &amp; Strea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5" draw:text-style-name="P4" draw:layer="layout" svg:width="4.57cm" svg:height="2.157cm" svg:x="2.286cm" svg:y="11.049cm">
          <text:p/>
          <draw:enhanced-geometry draw:mirror-horizontal="false" draw:mirror-vertical="false" svg:viewBox="0 0 0 0" draw:text-areas="?f5 ?f5 ?f6 ?f7" draw:type="ooxml-roundRect" draw:modifiers="1176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6" draw:style-name="gr6" draw:text-style-name="P3" draw:layer="layout" svg:width="4.57cm" svg:height="1.014cm" svg:x="2.286cm" svg:y="11.125cm">
          <text:p text:style-name="P2"><text:span text:style-name="T4">26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" draw:text-style-name="P3" draw:layer="layout" svg:width="4.57cm" svg:height="0.76cm" svg:x="2.286cm" svg:y="12.065cm">
          <text:p text:style-name="P2"><text:span text:style-name="T5">ASL Sig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4" draw:layer="layout" svg:width="4.57cm" svg:height="2.157cm" svg:x="7.62cm" svg:y="11.049cm">
          <text:p/>
          <draw:enhanced-geometry draw:mirror-horizontal="false" draw:mirror-vertical="false" svg:viewBox="0 0 0 0" draw:text-areas="?f5 ?f5 ?f6 ?f7" draw:type="ooxml-roundRect" draw:modifiers="1176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9" draw:style-name="gr8" draw:text-style-name="P3" draw:layer="layout" svg:width="4.57cm" svg:height="1.014cm" svg:x="7.62cm" svg:y="11.125cm">
          <text:p text:style-name="P2"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9" draw:text-style-name="P3" draw:layer="layout" svg:width="4.57cm" svg:height="0.76cm" svg:x="7.62cm" svg:y="12.065cm">
          <text:p text:style-name="P2"><text:span text:style-name="T5">Learning Un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5" draw:text-style-name="P4" draw:layer="layout" svg:width="4.57cm" svg:height="2.157cm" svg:x="12.954cm" svg:y="11.049cm">
          <text:p/>
          <draw:enhanced-geometry draw:mirror-horizontal="false" draw:mirror-vertical="false" svg:viewBox="0 0 0 0" draw:text-areas="?f5 ?f5 ?f6 ?f7" draw:type="ooxml-roundRect" draw:modifiers="1176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2" draw:style-name="gr10" draw:text-style-name="P3" draw:layer="layout" svg:width="4.57cm" svg:height="1.014cm" svg:x="12.954cm" svg:y="11.125cm">
          <text:p text:style-name="P2"><text:span text:style-name="T4">Real-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" draw:text-style-name="P3" draw:layer="layout" svg:width="4.57cm" svg:height="0.76cm" svg:x="12.954cm" svg:y="12.065cm">
          <text:p text:style-name="P2"><text:span text:style-name="T5">Camera A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5" draw:text-style-name="P4" draw:layer="layout" svg:width="4.57cm" svg:height="2.157cm" svg:x="18.288cm" svg:y="11.049cm">
          <text:p/>
          <draw:enhanced-geometry draw:mirror-horizontal="false" draw:mirror-vertical="false" svg:viewBox="0 0 0 0" draw:text-areas="?f5 ?f5 ?f6 ?f7" draw:type="ooxml-roundRect" draw:modifiers="1176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5" draw:style-name="gr12" draw:text-style-name="P3" draw:layer="layout" svg:width="4.57cm" svg:height="1.014cm" svg:x="18.288cm" svg:y="11.125cm">
          <text:p text:style-name="P2"><text:span text:style-name="T4">Urdu + 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3" draw:text-style-name="P3" draw:layer="layout" svg:width="4.57cm" svg:height="0.76cm" svg:x="18.288cm" svg:y="12.065cm">
          <text:p text:style-name="P2"><text:span text:style-name="T5">Bilingual T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4" draw:layer="layout" svg:width="15.238cm" svg:height="8.571cm" svg:x="1.905cm" svg:y="3.175cm" draw:page-number="1" presentation:class="page"/>
          <draw:frame draw:name="PlaceHolder 2" presentation:style-name="pr1" draw:text-style-name="P6" draw:layer="layout" svg:width="15.238cm" svg:height="9.999cm" svg:x="1.905cm" svg:y="12.224cm" presentation:class="notes" presentation:user-transformed="true">
            <draw:text-box>
              <text:p text:style-name="P5"><text:span text:style-name="T6">Title slide. App name: SignBridge. </text:span></text:p>
            </draw:text-box>
          </draw:frame>
          <draw:frame draw:name="PlaceHolder 3" presentation:style-name="pr2" draw:text-style-name="P8" draw:layer="layout" svg:width="8.253cm" svg:height="1.272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Text 0" draw:style-name="gr15" draw:text-style-name="P10" draw:layer="layout" svg:width="22.858cm" svg:height="1.649cm" svg:x="1.27cm" svg:y="0.762cm">
          <text:p text:style-name="P9"><text:span text:style-name="T8">What is SignBridg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6" draw:text-style-name="P10" draw:layer="layout" svg:width="22.858cm" svg:height="0.887cm" svg:x="1.27cm" svg:y="2.413cm">
          <text:p text:style-name="P9"><text:span text:style-name="T9">A desktop app that makes learning ASL engaging, measurable, and biling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7" draw:text-style-name="P11" draw:layer="layout" svg:width="7.364cm" svg:height="8.888cm" svg:x="1.016cm" svg:y="3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8" draw:text-style-name="P12" draw:layer="layout" svg:width="1.776cm" svg:height="1.776cm" svg:x="3.81cm" svg:y="4.0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" draw:text-style-name="P1" draw:layer="layout" svg:width="1.268cm" svg:height="1.268cm" svg:x="4.064cm" svg:y="4.267cm">
          <draw:image xlink:href="Pictures/10000001000001000000010005BB05410D8F51F6.png" xlink:type="simple" xlink:show="embed" xlink:actuate="onLoad" draw:mime-type="image/png">
            <text:p/>
          </draw:image>
          <svg:desc>preencoded.png</svg:desc>
        </draw:frame>
        <draw:custom-shape draw:name="Text 4" draw:style-name="gr19" draw:text-style-name="P3" draw:layer="layout" svg:width="7.364cm" svg:height="1.268cm" svg:x="1.016cm" svg:y="6.147cm">
          <text:p text:style-name="P2"><text:span text:style-name="T10">Real-Time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0" draw:text-style-name="P3" draw:layer="layout" svg:width="6.602cm" svg:height="4.57cm" svg:x="1.397cm" svg:y="7.569cm">
          <text:p text:style-name="P2"><text:span text:style-name="T11">Webcam-powered AI detects your hand signs instantly using a TensorFlow model trained on the ASL alphab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7" draw:text-style-name="P11" draw:layer="layout" svg:width="7.364cm" svg:height="8.888cm" svg:x="8.89cm" svg:y="3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1" draw:text-style-name="P13" draw:layer="layout" svg:width="1.776cm" svg:height="1.776cm" svg:x="11.684cm" svg:y="4.0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" draw:text-style-name="P1" draw:layer="layout" svg:width="1.268cm" svg:height="1.268cm" svg:x="11.938cm" svg:y="4.267cm">
          <draw:image xlink:href="Pictures/100000010000010000000100E9F08B06D7659463.png" xlink:type="simple" xlink:show="embed" xlink:actuate="onLoad" draw:mime-type="image/png">
            <text:p/>
          </draw:image>
          <svg:desc>preencoded.png</svg:desc>
        </draw:frame>
        <draw:custom-shape draw:name="Text 8" draw:style-name="gr22" draw:text-style-name="P3" draw:layer="layout" svg:width="7.364cm" svg:height="1.268cm" svg:x="8.89cm" svg:y="6.147cm">
          <text:p text:style-name="P2"><text:span text:style-name="T10">Bilingual Expe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3" draw:text-style-name="P3" draw:layer="layout" svg:width="6.602cm" svg:height="4.57cm" svg:x="9.271cm" svg:y="7.569cm">
          <text:p text:style-name="P2"><text:span text:style-name="T11">All signs come with English and Urdu speech synthesis, making the app accessible to Pakistani learn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7" draw:text-style-name="P11" draw:layer="layout" svg:width="7.364cm" svg:height="8.888cm" svg:x="16.764cm" svg:y="3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4" draw:text-style-name="P14" draw:layer="layout" svg:width="1.776cm" svg:height="1.776cm" svg:x="19.558cm" svg:y="4.0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" draw:text-style-name="P1" draw:layer="layout" svg:width="1.268cm" svg:height="1.268cm" svg:x="19.812cm" svg:y="4.267cm">
          <draw:image xlink:href="Pictures/100000010000010000000100DBA4DC62E955C13A.png" xlink:type="simple" xlink:show="embed" xlink:actuate="onLoad" draw:mime-type="image/png">
            <text:p/>
          </draw:image>
          <svg:desc>preencoded.png</svg:desc>
        </draw:frame>
        <draw:custom-shape draw:name="Text 12" draw:style-name="gr25" draw:text-style-name="P3" draw:layer="layout" svg:width="7.364cm" svg:height="1.268cm" svg:x="16.764cm" svg:y="6.147cm">
          <text:p text:style-name="P2"><text:span text:style-name="T10">Gamified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6" draw:text-style-name="P3" draw:layer="layout" svg:width="6.602cm" svg:height="4.57cm" svg:x="17.145cm" svg:y="7.569cm">
          <text:p text:style-name="P2"><text:span text:style-name="T11">Earn XP, maintain daily streaks, unlock achievement badges, and compete on the leaderboa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4" draw:layer="layout" svg:width="15.238cm" svg:height="8.571cm" svg:x="1.905cm" svg:y="3.175cm" draw:page-number="2" presentation:class="page"/>
          <draw:frame draw:name="PlaceHolder 2" presentation:style-name="pr3" draw:text-style-name="P15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" draw:text-style-name="P8" draw:layer="layout" svg:width="8.253cm" svg:height="1.272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 0" draw:style-name="gr27" draw:text-style-name="P10" draw:layer="layout" svg:width="22.858cm" svg:height="1.522cm" svg:x="1.27cm" svg:y="0.711cm">
          <text:p text:style-name="P9"><text:span text:style-name="T12">Core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8" draw:text-style-name="P4" draw:layer="layout" svg:width="7.618cm" svg:height="4.697cm" svg:x="1.016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" draw:text-style-name="P1" draw:layer="layout" svg:width="1.268cm" svg:height="1.268cm" svg:x="1.473cm" svg:y="4.14cm">
          <draw:image xlink:href="Pictures/1000000100000100000001001BEA9AC4B4DEA0F2.png" xlink:type="simple" xlink:show="embed" xlink:actuate="onLoad" draw:mime-type="image/png">
            <text:p/>
          </draw:image>
          <svg:desc>preencoded.png</svg:desc>
        </draw:frame>
        <draw:custom-shape draw:name="Text 2" draw:style-name="gr29" draw:text-style-name="P10" draw:layer="layout" svg:width="5.332cm" svg:height="0.963cm" svg:x="2.997cm" svg:y="3.2cm">
          <text:p text:style-name="P9"><text:span text:style-name="T13">Lea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10" draw:layer="layout" svg:width="5.332cm" svg:height="3.508cm" svg:x="2.997cm" svg:y="3.5cm">
          <text:p text:style-name="P9"><text:span text:style-name="T5">Browse A–Z alphabet, common words, and numbers by unit. Reference images + signing tip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8" draw:text-style-name="P4" draw:layer="layout" svg:width="7.618cm" svg:height="4.697cm" svg:x="9.01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1.268cm" svg:height="1.268cm" svg:x="9.474cm" svg:y="4.14cm">
          <draw:image xlink:href="Pictures/10000001000001000000010005BB05410D8F51F6.png" xlink:type="simple" xlink:show="embed" xlink:actuate="onLoad" draw:mime-type="image/png">
            <text:p/>
          </draw:image>
          <svg:desc>preencoded.png</svg:desc>
        </draw:frame>
        <draw:custom-shape draw:name="Text 5" draw:style-name="gr31" draw:text-style-name="P10" draw:layer="layout" svg:width="5.332cm" svg:height="0.963cm" svg:x="10.998cm" svg:y="3.2cm">
          <text:p text:style-name="P9"><text:span text:style-name="T13">Pract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2" draw:text-style-name="P10" draw:layer="layout" svg:width="5.332cm" svg:height="1.337cm" svg:x="10.998cm" svg:y="4.163cm">
          <text:p text:style-name="P9"><text:span text:style-name="T5">Live webcam feed. Hold sign for 1.5s to match. Earn XP and trigger badge unloc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8" draw:text-style-name="P4" draw:layer="layout" svg:width="7.618cm" svg:height="4.697cm" svg:x="17.018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268cm" svg:height="1.268cm" svg:x="17.475cm" svg:y="4.14cm">
          <draw:image xlink:href="Pictures/100000010000010000000100DBA4DC62E955C13A.png" xlink:type="simple" xlink:show="embed" xlink:actuate="onLoad" draw:mime-type="image/png">
            <text:p/>
          </draw:image>
          <svg:desc>preencoded.png</svg:desc>
        </draw:frame>
        <draw:custom-shape draw:name="Text 8" draw:style-name="gr33" draw:text-style-name="P10" draw:layer="layout" svg:width="5.332cm" svg:height="0.963cm" svg:x="18.999cm" svg:y="3.2cm">
          <text:p text:style-name="P9"><text:span text:style-name="T13">Qu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4" draw:text-style-name="P10" draw:layer="layout" svg:width="5.332cm" svg:height="2.5cm" svg:x="18.999cm" svg:y="4cm">
          <text:p text:style-name="P9"><text:span text:style-name="T5">Flashcard &amp; Sign-It modes. 10-question sessions. Perfect score earns bonus X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8" draw:text-style-name="P4" draw:layer="layout" svg:width="7.618cm" svg:height="4.697cm" svg:x="1.016cm" svg:y="8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" draw:text-style-name="P1" draw:layer="layout" svg:width="1.268cm" svg:height="1.268cm" svg:x="1.473cm" svg:y="9.474cm">
          <draw:image xlink:href="Pictures/100000010000010000000100073074011DF58DD7.png" xlink:type="simple" xlink:show="embed" xlink:actuate="onLoad" draw:mime-type="image/png">
            <text:p/>
          </draw:image>
          <svg:desc>preencoded.png</svg:desc>
        </draw:frame>
        <draw:custom-shape draw:name="Text 11" draw:style-name="gr35" draw:text-style-name="P10" draw:layer="layout" svg:width="5.332cm" svg:height="0.963cm" svg:x="2.997cm" svg:y="8.534cm">
          <text:p text:style-name="P9"><text:span text:style-name="T13">Spea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6" draw:text-style-name="P10" draw:layer="layout" svg:width="5.332cm" svg:height="3cm" svg:x="2.997cm" svg:y="9cm">
          <text:p text:style-name="P9"><text:span text:style-name="T5">Spell words by signing letters. Translate to Urdu. Speak in English or Urdu via T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8" draw:text-style-name="P4" draw:layer="layout" svg:width="7.618cm" svg:height="4.697cm" svg:x="9.017cm" svg:y="8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1" draw:text-style-name="P1" draw:layer="layout" svg:width="1.268cm" svg:height="1.268cm" svg:x="9.474cm" svg:y="9.474cm">
          <draw:image xlink:href="Pictures/100000010000010000000100A72F35CF43381946.png" xlink:type="simple" xlink:show="embed" xlink:actuate="onLoad" draw:mime-type="image/png">
            <text:p/>
          </draw:image>
          <svg:desc>preencoded.png</svg:desc>
        </draw:frame>
        <draw:custom-shape draw:name="Text 14" draw:style-name="gr37" draw:text-style-name="P10" draw:layer="layout" svg:width="5.332cm" svg:height="0.963cm" svg:x="10.998cm" svg:y="8.534cm">
          <text:p text:style-name="P9"><text:span text:style-name="T13">St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8" draw:text-style-name="P10" draw:layer="layout" svg:width="5.332cm" svg:height="1.5cm" svg:x="10.998cm" svg:y="9.5cm">
          <text:p text:style-name="P9"><text:span text:style-name="T5">Matplotlib charts: 7-day activity bar, accuracy trend line, curriculum donu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8" draw:text-style-name="P4" draw:layer="layout" svg:width="7.618cm" svg:height="4.697cm" svg:x="17.018cm" svg:y="8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1" draw:text-style-name="P1" draw:layer="layout" svg:width="1.268cm" svg:height="1.268cm" svg:x="17.475cm" svg:y="9.474cm">
          <draw:image xlink:href="Pictures/100000010000010000000100DE33E79CDFD336EF.png" xlink:type="simple" xlink:show="embed" xlink:actuate="onLoad" draw:mime-type="image/png">
            <text:p/>
          </draw:image>
          <svg:desc>preencoded.png</svg:desc>
        </draw:frame>
        <draw:custom-shape draw:name="Text 17" draw:style-name="gr39" draw:text-style-name="P10" draw:layer="layout" svg:width="5.332cm" svg:height="0.963cm" svg:x="18.999cm" svg:y="8.534cm">
          <text:p text:style-name="P9"><text:span text:style-name="T13">Leader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0" draw:text-style-name="P10" draw:layer="layout" svg:width="5.332cm" svg:height="1.45cm" svg:x="18.999cm" svg:y="9.55cm">
          <text:p text:style-name="P9"><text:span text:style-name="T5">Top 25 users ranked by XP with streaks. Current user highligh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4" draw:layer="layout" svg:width="15.238cm" svg:height="8.571cm" svg:x="1.905cm" svg:y="3.175cm" draw:page-number="3" presentation:class="page"/>
          <draw:frame draw:name="PlaceHolder 2" presentation:style-name="pr1" draw:text-style-name="P6" draw:layer="layout" svg:width="15.238cm" svg:height="9.999cm" svg:x="1.905cm" svg:y="12.224cm" presentation:class="notes" presentation:user-transformed="true">
            <draw:text-box>
              <text:p text:style-name="P5"><text:span text:style-name="T6">Walk through each of the six feature screens. The sidebar navigation gives instant access to all of them.</text:span></text:p>
            </draw:text-box>
          </draw:frame>
          <draw:frame draw:name="PlaceHolder 3" presentation:style-name="pr2" draw:text-style-name="P8" draw:layer="layout" svg:width="8.253cm" svg:height="1.272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Text 0" draw:style-name="gr41" draw:text-style-name="P10" draw:layer="layout" svg:width="22.858cm" svg:height="1.522cm" svg:x="1.27cm" svg:y="0.711cm">
          <text:p text:style-name="P9"><text:span text:style-name="T8">Gamification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7" draw:text-style-name="P11" draw:layer="layout" svg:width="11.428cm" svg:height="10.412cm" svg:x="1.016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2" draw:text-style-name="P16" draw:layer="layout" svg:width="3.554cm" svg:height="0.709cm" svg:x="1.524cm" svg:y="2.997cm">
          <text:p/>
          <draw:enhanced-geometry draw:mirror-horizontal="false" draw:mirror-vertical="false" svg:viewBox="0 0 0 0" draw:text-areas="?f5 ?f5 ?f6 ?f7" draw:type="ooxml-roundRect" draw:modifiers="2857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" draw:style-name="gr43" draw:text-style-name="P3" draw:layer="layout" svg:width="3.554cm" svg:height="0.709cm" svg:x="1.524cm" svg:y="2.997cm">
          <text:p text:style-name="P2"><text:span text:style-name="T14">XP &amp; LEV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4" draw:text-style-name="P10" draw:layer="layout" svg:width="10.158cm" svg:height="0.963cm" svg:x="1.524cm" svg:y="3.937cm">
          <text:p text:style-name="P9"><text:span text:style-name="T15">6 Level T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5" draw:text-style-name="P17" draw:layer="layout" svg:width="10.158cm" svg:height="0.963cm" svg:x="1.524cm" svg:y="5.207cm">
          <text:p/>
          <draw:enhanced-geometry draw:mirror-horizontal="false" draw:mirror-vertical="false" svg:viewBox="0 0 0 0" draw:text-areas="?f5 ?f5 ?f6 ?f7" draw:type="ooxml-roundRect" draw:modifiers="157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6" draw:style-name="gr46" draw:text-style-name="P10" draw:layer="layout" svg:width="4.57cm" svg:height="0.862cm" svg:x="1.905cm" svg:y="5.258cm">
          <text:p text:style-name="P9"><text:span text:style-name="T16">Begi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7" draw:text-style-name="P19" draw:layer="layout" svg:width="4.57cm" svg:height="0.862cm" svg:x="6.604cm" svg:y="5.258cm">
          <text:p text:style-name="P18"><text:span text:style-name="T17">0 – 500 X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8" draw:text-style-name="P20" draw:layer="layout" svg:width="10.158cm" svg:height="0.963cm" svg:x="1.524cm" svg:y="6.426cm">
          <text:p/>
          <draw:enhanced-geometry draw:mirror-horizontal="false" draw:mirror-vertical="false" svg:viewBox="0 0 0 0" draw:text-areas="?f5 ?f5 ?f6 ?f7" draw:type="ooxml-roundRect" draw:modifiers="157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9" draw:style-name="gr49" draw:text-style-name="P10" draw:layer="layout" svg:width="4.57cm" svg:height="0.862cm" svg:x="1.905cm" svg:y="6.477cm">
          <text:p text:style-name="P9"><text:span text:style-name="T16">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0" draw:text-style-name="P19" draw:layer="layout" svg:width="4.57cm" svg:height="0.862cm" svg:x="6.604cm" svg:y="6.477cm">
          <text:p text:style-name="P18"><text:span text:style-name="T17">500 – 1,250 X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51" draw:text-style-name="P21" draw:layer="layout" svg:width="10.158cm" svg:height="0.963cm" svg:x="1.524cm" svg:y="7.645cm">
          <text:p/>
          <draw:enhanced-geometry draw:mirror-horizontal="false" draw:mirror-vertical="false" svg:viewBox="0 0 0 0" draw:text-areas="?f5 ?f5 ?f6 ?f7" draw:type="ooxml-roundRect" draw:modifiers="157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2" draw:style-name="gr52" draw:text-style-name="P10" draw:layer="layout" svg:width="4.57cm" svg:height="0.862cm" svg:x="1.905cm" svg:y="7.696cm">
          <text:p text:style-name="P9"><text:span text:style-name="T16">Practitio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3" draw:text-style-name="P19" draw:layer="layout" svg:width="4.57cm" svg:height="0.862cm" svg:x="6.604cm" svg:y="7.696cm">
          <text:p text:style-name="P18"><text:span text:style-name="T17">1,250 – 2,500 X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54" draw:text-style-name="P22" draw:layer="layout" svg:width="10.158cm" svg:height="0.963cm" svg:x="1.524cm" svg:y="8.865cm">
          <text:p/>
          <draw:enhanced-geometry draw:mirror-horizontal="false" draw:mirror-vertical="false" svg:viewBox="0 0 0 0" draw:text-areas="?f5 ?f5 ?f6 ?f7" draw:type="ooxml-roundRect" draw:modifiers="157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5" draw:style-name="gr55" draw:text-style-name="P10" draw:layer="layout" svg:width="4.57cm" svg:height="0.862cm" svg:x="1.905cm" svg:y="8.915cm">
          <text:p text:style-name="P9"><text:span text:style-name="T16">Intermedi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6" draw:text-style-name="P19" draw:layer="layout" svg:width="4.57cm" svg:height="0.862cm" svg:x="6.604cm" svg:y="8.915cm">
          <text:p text:style-name="P18"><text:span text:style-name="T17">2500 – 5000 X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57" draw:text-style-name="P23" draw:layer="layout" svg:width="10.158cm" svg:height="0.963cm" svg:x="1.524cm" svg:y="10.084cm">
          <text:p/>
          <draw:enhanced-geometry draw:mirror-horizontal="false" draw:mirror-vertical="false" svg:viewBox="0 0 0 0" draw:text-areas="?f5 ?f5 ?f6 ?f7" draw:type="ooxml-roundRect" draw:modifiers="157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8" draw:style-name="gr58" draw:text-style-name="P10" draw:layer="layout" svg:width="4.57cm" svg:height="0.862cm" svg:x="1.905cm" svg:y="10.135cm">
          <text:p text:style-name="P9"><text:span text:style-name="T16">Advanc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59" draw:text-style-name="P19" draw:layer="layout" svg:width="4.57cm" svg:height="0.862cm" svg:x="6.604cm" svg:y="10.135cm">
          <text:p text:style-name="P18"><text:span text:style-name="T17">5000 – 9000 X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60" draw:text-style-name="P24" draw:layer="layout" svg:width="10.158cm" svg:height="0.963cm" svg:x="1.524cm" svg:y="11.303cm">
          <text:p/>
          <draw:enhanced-geometry draw:mirror-horizontal="false" draw:mirror-vertical="false" svg:viewBox="0 0 0 0" draw:text-areas="?f5 ?f5 ?f6 ?f7" draw:type="ooxml-roundRect" draw:modifiers="157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1" draw:style-name="gr61" draw:text-style-name="P10" draw:layer="layout" svg:width="4.57cm" svg:height="0.862cm" svg:x="1.905cm" svg:y="11.354cm">
          <text:p text:style-name="P9"><text:span text:style-name="T16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62" draw:text-style-name="P19" draw:layer="layout" svg:width="4.57cm" svg:height="0.862cm" svg:x="6.604cm" svg:y="11.354cm">
          <text:p text:style-name="P18"><text:span text:style-name="T17">9000+ X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7" draw:text-style-name="P11" draw:layer="layout" svg:width="11.174cm" svg:height="10.412cm" svg:x="13.326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63" draw:text-style-name="P25" draw:layer="layout" svg:width="3.554cm" svg:height="0.709cm" svg:x="13.462cm" svg:y="2.997cm">
          <text:p/>
          <draw:enhanced-geometry draw:mirror-horizontal="false" draw:mirror-vertical="false" svg:viewBox="0 0 0 0" draw:text-areas="?f5 ?f5 ?f6 ?f7" draw:type="ooxml-roundRect" draw:modifiers="2857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5" draw:style-name="gr64" draw:text-style-name="P3" draw:layer="layout" svg:width="3.554cm" svg:height="0.709cm" svg:x="13.462cm" svg:y="2.997cm">
          <text:p text:style-name="P2"><text:span text:style-name="T18">STREA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" draw:text-style-name="P1" draw:layer="layout" svg:width="1.141cm" svg:height="1.141cm" svg:x="13.589cm" svg:y="3.962cm">
          <draw:image xlink:href="Pictures/10000001000001000000010020B0CF70A218AEDC.png" xlink:type="simple" xlink:show="embed" xlink:actuate="onLoad" draw:mime-type="image/png">
            <text:p/>
          </draw:image>
          <svg:desc>preencoded.png</svg:desc>
        </draw:frame>
        <draw:custom-shape draw:name="Text 26" draw:style-name="gr65" draw:text-style-name="P10" draw:layer="layout" svg:width="8.634cm" svg:height="1.038cm" svg:x="14.986cm" svg:y="3.962cm">
          <text:p text:style-name="P9"><text:span text:style-name="T17">Daily streak resets if you miss a day.</text:span></text:p>
          <text:p text:style-name="P9"><text:span text:style-name="T17">Hold a 7-day streak for a +50 XP weekly bonu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66" draw:text-style-name="P26" draw:layer="layout" svg:width="3.538cm" svg:height="1.029cm" svg:x="13.462cm" svg:y="5.5cm">
          <text:p/>
          <draw:enhanced-geometry draw:mirror-horizontal="false" draw:mirror-vertical="false" svg:viewBox="0 0 0 0" draw:text-areas="?f5 ?f5 ?f6 ?f7" draw:type="ooxml-roundRect" draw:modifiers="2857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8" draw:style-name="gr67" draw:text-style-name="P3" draw:layer="layout" svg:width="2.5cm" svg:height="1.029cm" svg:x="14cm" svg:y="5.5cm">
          <text:p text:style-name="P2"><text:span text:style-name="T19">BA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68" draw:text-style-name="P27" draw:layer="layout" svg:width="2.233cm" svg:height="2.233cm" svg:x="13.624cm" svg:y="6.767cm">
          <text:p/>
          <draw:enhanced-geometry draw:mirror-horizontal="false" draw:mirror-vertical="false" svg:viewBox="0 0 0 0" draw:text-areas="?f5 ?f5 ?f6 ?f7" draw:type="ooxml-roundRect" draw:modifiers="11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2" draw:style-name="gr69" draw:text-style-name="P3" draw:layer="layout" svg:width="2.64cm" svg:height="1cm" svg:x="13.259cm" svg:y="9cm">
          <text:p text:style-name="P2"><text:span text:style-name="T20">First 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68" draw:text-style-name="P27" draw:layer="layout" svg:width="2.233cm" svg:height="2.233cm" svg:x="16.154cm" svg:y="6.767cm">
          <text:p/>
          <draw:enhanced-geometry draw:mirror-horizontal="false" draw:mirror-vertical="false" svg:viewBox="0 0 0 0" draw:text-areas="?f5 ?f5 ?f6 ?f7" draw:type="ooxml-roundRect" draw:modifiers="11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5" draw:style-name="gr70" draw:text-style-name="P3" draw:layer="layout" svg:width="2.64cm" svg:height="1cm" svg:x="15.951cm" svg:y="9cm">
          <text:p text:style-name="P2"><text:span text:style-name="T20">Week War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68" draw:text-style-name="P27" draw:layer="layout" svg:width="2.233cm" svg:height="2.233cm" svg:x="18.767cm" svg:y="6.767cm">
          <text:p/>
          <draw:enhanced-geometry draw:mirror-horizontal="false" draw:mirror-vertical="false" svg:viewBox="0 0 0 0" draw:text-areas="?f5 ?f5 ?f6 ?f7" draw:type="ooxml-roundRect" draw:modifiers="11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8" draw:style-name="gr71" draw:text-style-name="P3" draw:layer="layout" svg:width="2.64cm" svg:height="1cm" svg:x="18.644cm" svg:y="9cm">
          <text:p text:style-name="P2"><text:span text:style-name="T20">Monthly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68" draw:text-style-name="P27" draw:layer="layout" svg:width="2.233cm" svg:height="2.233cm" svg:x="21.267cm" svg:y="6.767cm">
          <text:p/>
          <draw:enhanced-geometry draw:mirror-horizontal="false" draw:mirror-vertical="false" svg:viewBox="0 0 0 0" draw:text-areas="?f5 ?f5 ?f6 ?f7" draw:type="ooxml-roundRect" draw:modifiers="11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41" draw:style-name="gr72" draw:text-style-name="P3" draw:layer="layout" svg:width="2.64cm" svg:height="1cm" svg:x="21.336cm" svg:y="9cm">
          <text:p text:style-name="P2"><text:span text:style-name="T20">Alphabet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68" draw:text-style-name="P27" draw:layer="layout" svg:width="2.233cm" svg:height="2.233cm" svg:x="14.5cm" svg:y="10cm">
          <text:p/>
          <draw:enhanced-geometry draw:mirror-horizontal="false" draw:mirror-vertical="false" svg:viewBox="0 0 0 0" draw:text-areas="?f5 ?f5 ?f6 ?f7" draw:type="ooxml-roundRect" draw:modifiers="11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44" draw:style-name="gr73" draw:text-style-name="P3" draw:layer="layout" svg:width="2cm" svg:height="0.846cm" svg:x="14.5cm" svg:y="12.233cm">
          <text:p text:style-name="P2"><text:span text:style-name="T20">Quiz 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68" draw:text-style-name="P27" draw:layer="layout" svg:width="2.233cm" svg:height="2.233cm" svg:x="17.267cm" svg:y="10cm">
          <text:p/>
          <draw:enhanced-geometry draw:mirror-horizontal="false" draw:mirror-vertical="false" svg:viewBox="0 0 0 0" draw:text-areas="?f5 ?f5 ?f6 ?f7" draw:type="ooxml-roundRect" draw:modifiers="11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47" draw:style-name="gr74" draw:text-style-name="P3" draw:layer="layout" svg:width="2cm" svg:height="0.846cm" svg:x="17.5cm" svg:y="12.233cm">
          <text:p text:style-name="P2"><text:span text:style-name="T20">Biling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68" draw:text-style-name="P27" draw:layer="layout" svg:width="2.233cm" svg:height="2.233cm" svg:x="19.903cm" svg:y="10cm">
          <text:p/>
          <draw:enhanced-geometry draw:mirror-horizontal="false" draw:mirror-vertical="false" svg:viewBox="0 0 0 0" draw:text-areas="?f5 ?f5 ?f6 ?f7" draw:type="ooxml-roundRect" draw:modifiers="11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50" draw:style-name="gr75" draw:text-style-name="P3" draw:layer="layout" svg:width="2cm" svg:height="0.846cm" svg:x="20cm" svg:y="12.233cm">
          <text:p text:style-name="P2"><text:span text:style-name="T20">Centur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28" draw:layer="layout" svg:width="2.233cm" svg:height="2.271cm" svg:x="17.267cm" svg:y="9.962cm">
          <draw:image xlink:href="Pictures/10000000000002BE000002CA790931A18D1D579F.jpg" xlink:type="simple" xlink:show="embed" xlink:actuate="onLoad" draw:mime-type="image/jpeg">
            <text:p/>
          </draw:image>
        </draw:frame>
        <draw:frame draw:style-name="gr76" draw:text-style-name="P28" draw:layer="layout" svg:width="2.333cm" svg:height="2.276cm" svg:x="19.893cm" svg:y="9.957cm">
          <draw:image xlink:href="Pictures/10000000000003820000036CCE2AF61543481DA5.jpg" xlink:type="simple" xlink:show="embed" xlink:actuate="onLoad" draw:mime-type="image/jpeg">
            <text:p/>
          </draw:image>
        </draw:frame>
        <draw:frame draw:style-name="gr76" draw:text-style-name="P28" draw:layer="layout" svg:width="2.327cm" svg:height="2.308cm" svg:x="13.624cm" svg:y="6.692cm">
          <draw:image xlink:href="Pictures/1000000000000200000001C3D031C89912A234B8.jpg" xlink:type="simple" xlink:show="embed" xlink:actuate="onLoad" draw:mime-type="image/jpeg">
            <text:p/>
          </draw:image>
        </draw:frame>
        <draw:frame draw:style-name="gr76" draw:text-style-name="P28" draw:layer="layout" svg:width="2.283cm" svg:height="2.273cm" svg:x="14.45cm" svg:y="9.96cm">
          <draw:image xlink:href="Pictures/10000000000001CE000001CC664AE7042EE2097B.jpg" xlink:type="simple" xlink:show="embed" xlink:actuate="onLoad" draw:mime-type="image/jpeg">
            <text:p/>
          </draw:image>
        </draw:frame>
        <draw:frame draw:style-name="gr76" draw:text-style-name="P28" draw:layer="layout" svg:width="2.291cm" svg:height="2.351cm" svg:x="16.154cm" svg:y="6.681cm">
          <draw:image xlink:href="Pictures/10000000000001F6000002036634A8258C25350D.jpg" xlink:type="simple" xlink:show="embed" xlink:actuate="onLoad" draw:mime-type="image/jpeg">
            <text:p/>
          </draw:image>
        </draw:frame>
        <draw:frame draw:style-name="gr76" draw:text-style-name="P28" draw:layer="layout" svg:width="2.251cm" svg:height="2.233cm" svg:x="21.284cm" svg:y="6.767cm">
          <draw:image xlink:href="Pictures/10000000000004140000040C5592D3A5349FB802.jpg" xlink:type="simple" xlink:show="embed" xlink:actuate="onLoad" draw:mime-type="image/jpeg">
            <text:p/>
          </draw:image>
        </draw:frame>
        <draw:frame draw:style-name="gr76" draw:text-style-name="P28" draw:layer="layout" svg:width="2.233cm" svg:height="2.233cm" svg:x="18.767cm" svg:y="6.767cm">
          <draw:image xlink:href="Pictures/10000000000003B2000003BE8D5004588A237BD9.jpg" xlink:type="simple" xlink:show="embed" xlink:actuate="onLoad" draw:mime-type="image/jpeg">
            <text:p/>
          </draw:image>
        </draw:frame>
        <presentation:notes draw:style-name="dp2">
          <draw:page-thumbnail draw:name="PlaceHolder 1" draw:style-name="gr14" draw:layer="layout" svg:width="15.238cm" svg:height="8.571cm" svg:x="1.905cm" svg:y="3.175cm" draw:page-number="4" presentation:class="page"/>
          <draw:frame draw:name="PlaceHolder 2" presentation:style-name="pr1" draw:text-style-name="P6" draw:layer="layout" svg:width="15.238cm" svg:height="9.999cm" svg:x="1.905cm" svg:y="12.224cm" presentation:class="notes" presentation:user-transformed="true">
            <draw:text-box>
              <text:p text:style-name="P5"><text:span text:style-name="T6">The gamification loop: Practice/Quiz → earn XP → level up → maintain streak → unlock badges. Badges are awarded for: first sign, 7-day streak, 30-day streak, completing alphabet, perfect quiz, 10x Urdu TTS, 1000 XP.</text:span></text:p>
            </draw:text-box>
          </draw:frame>
          <draw:frame draw:name="PlaceHolder 3" presentation:style-name="pr2" draw:text-style-name="P8" draw:layer="layout" svg:width="8.253cm" svg:height="1.272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 0" draw:style-name="gr77" draw:text-style-name="P10" draw:layer="layout" svg:width="22.858cm" svg:height="1.522cm" svg:x="1.27cm" svg:y="0.711cm">
          <text:p text:style-name="P9"><text:span text:style-name="T12">Learning Curricul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8" draw:text-style-name="P4" draw:layer="layout" svg:width="7.618cm" svg:height="10.539cm" svg:x="1.016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78" draw:text-style-name="P13" draw:layer="layout" svg:width="6.704cm" svg:height="0.811cm" svg:x="1.473cm" svg:y="3.099cm">
          <text:p/>
          <draw:enhanced-geometry draw:mirror-horizontal="false" draw:mirror-vertical="false" svg:viewBox="0 0 0 0" draw:text-areas="?f5 ?f5 ?f6 ?f7" draw:type="ooxml-roundRect" draw:modifiers="187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" draw:style-name="gr79" draw:text-style-name="P3" draw:layer="layout" svg:width="6.704cm" svg:height="0.811cm" svg:x="1.473cm" svg:y="3.099cm">
          <text:p text:style-name="P2"><text:span text:style-name="T21">UNI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0" draw:text-style-name="P3" draw:layer="layout" svg:width="6.704cm" svg:height="1.065cm" svg:x="1.473cm" svg:y="4.115cm">
          <text:p text:style-name="P2"><text:span text:style-name="T22">ASL Alphab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1" draw:text-style-name="P3" draw:layer="layout" svg:width="6.704cm" svg:height="0.709cm" svg:x="1.473cm" svg:y="5.207cm">
          <text:p text:style-name="P2"><text:span text:style-name="T23">26 Sig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2" draw:text-style-name="P29" draw:layer="layout" svg:width="6.704cm" svg:height="2.538cm" svg:x="1.473cm" svg:y="6.223cm">
          <text:p/>
          <draw:enhanced-geometry draw:mirror-horizontal="false" draw:mirror-vertical="false" svg:viewBox="0 0 0 0" draw:text-areas="?f5 ?f5 ?f6 ?f7" draw:type="ooxml-roundRect" draw:modifiers="8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0" draw:style-name="gr1" draw:text-style-name="P1" draw:layer="layout" svg:width="0.455cm" svg:height="0.455cm" svg:x="1.575cm" svg:y="9.271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9" draw:style-name="gr83" draw:text-style-name="P10" draw:layer="layout" svg:width="5.84cm" svg:height="0.557cm" svg:x="2.235cm" svg:y="9.22cm">
          <text:p text:style-name="P9"><text:span text:style-name="T5">A – Z hand sig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0.455cm" svg:height="0.455cm" svg:x="1.575cm" svg:y="10.185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10" draw:style-name="gr84" draw:text-style-name="P10" draw:layer="layout" svg:width="5.84cm" svg:height="0.557cm" svg:x="2.235cm" svg:y="10.135cm">
          <text:p text:style-name="P9"><text:span text:style-name="T5">Signing tips per le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0.455cm" svg:height="0.455cm" svg:x="1.575cm" svg:y="11.1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11" draw:style-name="gr85" draw:text-style-name="P10" draw:layer="layout" svg:width="5.84cm" svg:height="0.557cm" svg:x="2.235cm" svg:y="11.049cm">
          <text:p text:style-name="P9"><text:span text:style-name="T5">XP reward: 10 per 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" draw:text-style-name="P1" draw:layer="layout" svg:width="0.455cm" svg:height="0.455cm" svg:x="1.575cm" svg:y="12.014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12" draw:style-name="gr86" draw:text-style-name="P10" draw:layer="layout" svg:width="5.84cm" svg:height="0.557cm" svg:x="2.235cm" svg:y="11.963cm">
          <text:p text:style-name="P9"><text:span text:style-name="T5">Reference image per 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8" draw:text-style-name="P4" draw:layer="layout" svg:width="7.618cm" svg:height="10.539cm" svg:x="9.017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7" draw:text-style-name="P14" draw:layer="layout" svg:width="6.704cm" svg:height="0.811cm" svg:x="9.474cm" svg:y="3.099cm">
          <text:p/>
          <draw:enhanced-geometry draw:mirror-horizontal="false" draw:mirror-vertical="false" svg:viewBox="0 0 0 0" draw:text-areas="?f5 ?f5 ?f6 ?f7" draw:type="ooxml-roundRect" draw:modifiers="187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5" draw:style-name="gr88" draw:text-style-name="P3" draw:layer="layout" svg:width="6.704cm" svg:height="0.811cm" svg:x="9.474cm" svg:y="3.099cm">
          <text:p text:style-name="P2"><text:span text:style-name="T24">UNI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89" draw:text-style-name="P3" draw:layer="layout" svg:width="6.704cm" svg:height="1.065cm" svg:x="9.474cm" svg:y="4.115cm">
          <text:p text:style-name="P2"><text:span text:style-name="T22">Common 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90" draw:text-style-name="P3" draw:layer="layout" svg:width="6.704cm" svg:height="0.709cm" svg:x="9.474cm" svg:y="5.207cm">
          <text:p text:style-name="P2"><text:span text:style-name="T25">8+ Sig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91" draw:text-style-name="P29" draw:layer="layout" svg:width="6.704cm" svg:height="2.538cm" svg:x="9.474cm" svg:y="6.223cm">
          <text:p/>
          <draw:enhanced-geometry draw:mirror-horizontal="false" draw:mirror-vertical="false" svg:viewBox="0 0 0 0" draw:text-areas="?f5 ?f5 ?f6 ?f7" draw:type="ooxml-roundRect" draw:modifiers="8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4" draw:style-name="gr1" draw:text-style-name="P1" draw:layer="layout" svg:width="0.455cm" svg:height="0.455cm" svg:x="9.576cm" svg:y="9.271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21" draw:style-name="gr92" draw:text-style-name="P10" draw:layer="layout" svg:width="5.84cm" svg:height="0.557cm" svg:x="10.236cm" svg:y="9.22cm">
          <text:p text:style-name="P9"><text:span text:style-name="T5">Hello, Thank You, P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1" draw:text-style-name="P1" draw:layer="layout" svg:width="0.455cm" svg:height="0.455cm" svg:x="9.576cm" svg:y="10.185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22" draw:style-name="gr93" draw:text-style-name="P10" draw:layer="layout" svg:width="5.84cm" svg:height="0.557cm" svg:x="10.236cm" svg:y="10.135cm">
          <text:p text:style-name="P9"><text:span text:style-name="T5">Sorry, Yes, No, Help,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1" draw:text-style-name="P1" draw:layer="layout" svg:width="0.455cm" svg:height="0.455cm" svg:x="9.576cm" svg:y="11.1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23" draw:style-name="gr94" draw:text-style-name="P10" draw:layer="layout" svg:width="5.84cm" svg:height="0.557cm" svg:x="10.236cm" svg:y="11.049cm">
          <text:p text:style-name="P9"><text:span text:style-name="T5">XP reward: 10–20 per 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1" draw:text-style-name="P1" draw:layer="layout" svg:width="0.455cm" svg:height="0.455cm" svg:x="9.576cm" svg:y="12.014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24" draw:style-name="gr95" draw:text-style-name="P10" draw:layer="layout" svg:width="5.84cm" svg:height="0.557cm" svg:x="10.236cm" svg:y="11.963cm">
          <text:p text:style-name="P9"><text:span text:style-name="T5">More words plan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28" draw:text-style-name="P4" draw:layer="layout" svg:width="7.618cm" svg:height="10.539cm" svg:x="17.018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96" draw:text-style-name="P12" draw:layer="layout" svg:width="6.704cm" svg:height="0.811cm" svg:x="17.475cm" svg:y="3.099cm">
          <text:p/>
          <draw:enhanced-geometry draw:mirror-horizontal="false" draw:mirror-vertical="false" svg:viewBox="0 0 0 0" draw:text-areas="?f5 ?f5 ?f6 ?f7" draw:type="ooxml-roundRect" draw:modifiers="187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7" draw:style-name="gr97" draw:text-style-name="P3" draw:layer="layout" svg:width="6.704cm" svg:height="0.811cm" svg:x="17.475cm" svg:y="3.099cm">
          <text:p text:style-name="P2"><text:span text:style-name="T26">UNIT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98" draw:text-style-name="P3" draw:layer="layout" svg:width="6.704cm" svg:height="1.065cm" svg:x="17.475cm" svg:y="4.115cm">
          <text:p text:style-name="P2"><text:span text:style-name="T22">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99" draw:text-style-name="P3" draw:layer="layout" svg:width="6.704cm" svg:height="0.709cm" svg:x="17.475cm" svg:y="5.207cm">
          <text:p text:style-name="P2"><text:span text:style-name="T27">10 <text:s/>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00" draw:text-style-name="P29" draw:layer="layout" svg:width="6.704cm" svg:height="2.538cm" svg:x="17.475cm" svg:y="6.223cm">
          <text:p/>
          <draw:enhanced-geometry draw:mirror-horizontal="false" draw:mirror-vertical="false" svg:viewBox="0 0 0 0" draw:text-areas="?f5 ?f5 ?f6 ?f7" draw:type="ooxml-roundRect" draw:modifiers="8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8" draw:style-name="gr1" draw:text-style-name="P1" draw:layer="layout" svg:width="0.455cm" svg:height="0.455cm" svg:x="17.577cm" svg:y="9.271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33" draw:style-name="gr101" draw:text-style-name="P10" draw:layer="layout" svg:width="5.84cm" svg:height="0.557cm" svg:x="18.237cm" svg:y="9.22cm">
          <text:p text:style-name="P9"><text:span text:style-name="T5">Zero <text:s/>through N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1" draw:text-style-name="P1" draw:layer="layout" svg:width="0.455cm" svg:height="0.455cm" svg:x="17.577cm" svg:y="10.185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34" draw:style-name="gr102" draw:text-style-name="P10" draw:layer="layout" svg:width="5.84cm" svg:height="0.557cm" svg:x="18.237cm" svg:y="10.135cm">
          <text:p text:style-name="P9"><text:span text:style-name="T28">Digits c</text:span><text:span text:style-name="T5">an <text:s/>be ad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1" draw:text-style-name="P1" draw:layer="layout" svg:width="0.455cm" svg:height="0.455cm" svg:x="17.577cm" svg:y="11.1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35" draw:style-name="gr103" draw:text-style-name="P10" draw:layer="layout" svg:width="5.84cm" svg:height="0.557cm" svg:x="18.237cm" svg:y="11.049cm">
          <text:p text:style-name="P9"><text:span text:style-name="T5">XP reward: 10 per 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1" draw:style-name="gr1" draw:text-style-name="P1" draw:layer="layout" svg:width="0.455cm" svg:height="0.455cm" svg:x="17.577cm" svg:y="12.014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36" draw:style-name="gr104" draw:text-style-name="P10" draw:layer="layout" svg:width="5.84cm" svg:height="0.557cm" svg:x="18.237cm" svg:y="11.963cm">
          <text:p text:style-name="P9"><text:span text:style-name="T5">Expandable via seed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28" draw:layer="layout" svg:width="2.23cm" svg:height="2.845cm" svg:x="1.473cm" svg:y="5.916cm">
          <draw:image xlink:href="Pictures/10000000000000BC00000110BCB67A15C9848ADB.jpg" xlink:type="simple" xlink:show="embed" xlink:actuate="onLoad" draw:mime-type="image/jpeg">
            <text:p/>
          </draw:image>
        </draw:frame>
        <draw:frame draw:style-name="gr76" draw:text-style-name="P28" draw:layer="layout" svg:width="2.138cm" svg:height="2.832cm" svg:x="6.039cm" svg:y="5.979cm">
          <draw:image xlink:href="Pictures/10000000000000BA000001034D1FE0EDDA919A71.jpg" xlink:type="simple" xlink:show="embed" xlink:actuate="onLoad" draw:mime-type="image/jpeg">
            <text:p/>
          </draw:image>
        </draw:frame>
        <draw:frame draw:style-name="gr76" draw:text-style-name="P28" draw:layer="layout" svg:width="2.336cm" svg:height="2.845cm" svg:x="3.703cm" svg:y="5.966cm">
          <draw:image xlink:href="Pictures/10000000000000C300000112BAB1E9AB3F08DFF7.jpg" xlink:type="simple" xlink:show="embed" xlink:actuate="onLoad" draw:mime-type="image/jpeg">
            <text:p/>
          </draw:image>
        </draw:frame>
        <draw:frame draw:style-name="gr76" draw:text-style-name="P28" draw:layer="layout" svg:width="2.073cm" svg:height="2.909cm" svg:x="9.474cm" svg:y="5.948cm">
          <draw:image xlink:href="Pictures/100000000000016F000002031DF362C208BFD045.jpg" xlink:type="simple" xlink:show="embed" xlink:actuate="onLoad" draw:mime-type="image/jpeg">
            <text:p/>
          </draw:image>
        </draw:frame>
        <draw:frame draw:style-name="gr76" draw:text-style-name="P28" draw:layer="layout" svg:width="2.434cm" svg:height="2.951cm" svg:x="11.547cm" svg:y="5.916cm">
          <draw:image xlink:href="Pictures/1000000000000170000002038FF20AD697CE3F91.jpg" xlink:type="simple" xlink:show="embed" xlink:actuate="onLoad" draw:mime-type="image/jpeg">
            <text:p/>
          </draw:image>
        </draw:frame>
        <draw:frame draw:style-name="gr76" draw:text-style-name="P28" draw:layer="layout" svg:width="2.197cm" svg:height="2.845cm" svg:x="13.981cm" svg:y="5.916cm">
          <draw:image xlink:href="Pictures/1000000000000174000002215C283EC0689E2777.jpg" xlink:type="simple" xlink:show="embed" xlink:actuate="onLoad" draw:mime-type="image/jpeg">
            <text:p/>
          </draw:image>
        </draw:frame>
        <draw:frame draw:style-name="gr76" draw:text-style-name="P28" draw:layer="layout" svg:width="2.279cm" svg:height="2.584cm" svg:x="17.475cm" svg:y="6.177cm">
          <draw:image xlink:href="Pictures/10000000000001C800000205A160B2CD4C39153B.jpg" xlink:type="simple" xlink:show="embed" xlink:actuate="onLoad" draw:mime-type="image/jpeg">
            <text:p/>
          </draw:image>
        </draw:frame>
        <draw:frame draw:style-name="gr76" draw:text-style-name="P28" draw:layer="layout" svg:width="2.421cm" svg:height="2.584cm" svg:x="19.57cm" svg:y="6.177cm">
          <draw:image xlink:href="Pictures/10000000000001BF000001DD899A589098B3111C.jpg" xlink:type="simple" xlink:show="embed" xlink:actuate="onLoad" draw:mime-type="image/jpeg">
            <text:p/>
          </draw:image>
        </draw:frame>
        <draw:frame draw:style-name="gr76" draw:text-style-name="P28" draw:layer="layout" svg:width="2.368cm" svg:height="2.584cm" svg:x="21.991cm" svg:y="6.177cm">
          <draw:image xlink:href="Pictures/10000000000001C2000001EBA6740070689044A6.jpg" xlink:type="simple" xlink:show="embed" xlink:actuate="onLoad" draw:mime-type="image/jpeg">
            <text:p/>
          </draw:image>
        </draw:frame>
        <presentation:notes draw:style-name="dp2">
          <draw:page-thumbnail draw:name="PlaceHolder 1" draw:style-name="gr14" draw:layer="layout" svg:width="15.238cm" svg:height="8.571cm" svg:x="1.905cm" svg:y="3.175cm" draw:page-number="5" presentation:class="page"/>
          <draw:frame draw:name="PlaceHolder 2" presentation:style-name="pr1" draw:text-style-name="P6" draw:layer="layout" svg:width="15.238cm" svg:height="9.999cm" svg:x="1.905cm" svg:y="12.224cm" presentation:class="notes" presentation:user-transformed="true">
            <draw:text-box>
              <text:p text:style-name="P5"><text:span text:style-name="T6">The curriculum is seeded from seed_lessons.py. To add more words: open seed_lessons.py, append to COMMON_WORDS or NUMBERS list, delete signbridge.db, relaunch. To add sign images: place A.png–Z.png in assets/signs/.</text:span></text:p>
            </draw:text-box>
          </draw:frame>
          <draw:frame draw:name="PlaceHolder 3" presentation:style-name="pr2" draw:text-style-name="P8" draw:layer="layout" svg:width="8.253cm" svg:height="1.272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6" draw:style-name="dp3" draw:master-page-name="Blank_20_Slide">
        <office:forms form:automatic-focus="false" form:apply-design-mode="false"/>
        <draw:custom-shape draw:name="Text 0" draw:style-name="gr105" draw:text-style-name="P10" draw:layer="layout" svg:width="22.858cm" svg:height="1.522cm" svg:x="1.27cm" svg:y="0.711cm">
          <text:p text:style-name="P9"><text:span text:style-name="T8">User Profile &amp; Avat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7" draw:text-style-name="P11" draw:layer="layout" svg:width="10.666cm" svg:height="10.412cm" svg:x="1.016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06" draw:text-style-name="P16" draw:layer="layout" svg:width="3.476cm" svg:height="1.016cm" svg:x="1.524cm" svg:y="2.997cm">
          <text:p/>
          <draw:enhanced-geometry draw:mirror-horizontal="false" draw:mirror-vertical="false" svg:viewBox="0 0 0 0" draw:text-areas="?f5 ?f5 ?f6 ?f7" draw:type="ooxml-roundRect" draw:modifiers="2857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" draw:style-name="gr107" draw:text-style-name="P3" draw:layer="layout" svg:width="3.554cm" svg:height="1.013cm" svg:x="1.524cm" svg:y="3cm">
          <text:p text:style-name="P2"><text:span text:style-name="T14">PROFILE 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08" draw:text-style-name="P30" draw:layer="layout" svg:width="3.808cm" svg:height="3.808cm" svg:x="3.937cm" svg:y="4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109" draw:text-style-name="P3" draw:layer="layout" svg:width="3.808cm" svg:height="1.776cm" svg:x="3.937cm" svg:y="4.521cm">
          <text:p text:style-name="P2"><text:span text:style-name="T29"/></text:p>
          <text:p text:style-name="P2"><text:span text:style-name="T29"/></text:p>
          <text:p text:style-name="P2"><text:span text:style-name="T30">Avatar</text:span></text:p>
          <text:p text:style-name="P2"><text:span text:style-name="T30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0" draw:text-style-name="P3" draw:layer="layout" svg:width="9.65cm" svg:height="1.014cm" svg:x="1.524cm" svg:y="8.179cm">
          <text:p text:style-name="P2"><text:span text:style-name="T15">Display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1" draw:text-style-name="P3" draw:layer="layout" svg:width="9.65cm" svg:height="0.709cm" svg:x="1.524cm" svg:y="9.144cm">
          <text:p text:style-name="P2"><text:span text:style-name="T31">@user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12" draw:text-style-name="P10" draw:layer="layout" svg:width="2.792cm" svg:height="0.709cm" svg:x="1.651cm" svg:y="10.16cm">
          <text:p text:style-name="P9"><text:span text:style-name="T32">Leve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3" draw:text-style-name="P10" draw:layer="layout" svg:width="4.5cm" svg:height="0.709cm" svg:x="4.5cm" svg:y="10.16cm">
          <text:p text:style-name="P9"><text:span text:style-name="T33">Practitioner · Leve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4" draw:text-style-name="P10" draw:layer="layout" svg:width="2.792cm" svg:height="0.709cm" svg:x="1.651cm" svg:y="10.973cm">
          <text:p text:style-name="P9"><text:span text:style-name="T32">Total X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5" draw:text-style-name="P10" draw:layer="layout" svg:width="6.602cm" svg:height="0.709cm" svg:x="4.572cm" svg:y="10.973cm">
          <text:p text:style-name="P9"><text:span text:style-name="T33">2,450 X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6" draw:text-style-name="P10" draw:layer="layout" svg:width="2.349cm" svg:height="0.818cm" svg:x="1.651cm" svg:y="11.682cm">
          <text:p text:style-name="P9"><text:span text:style-name="T32">Streak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7" draw:text-style-name="P10" draw:layer="layout" svg:width="3.5cm" svg:height="0.818cm" svg:x="4.5cm" svg:y="11.682cm">
          <text:p text:style-name="P9"><text:span text:style-name="T33">🔥 </text:span><text:span text:style-name="T33">14 D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7" draw:text-style-name="P11" draw:layer="layout" svg:width="11.809cm" svg:height="10.412cm" svg:x="12.191cm" svg:y="3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18" draw:text-style-name="P31" draw:layer="layout" svg:width="3.554cm" svg:height="0.709cm" svg:x="12.827cm" svg:y="2.997cm">
          <text:p/>
          <draw:enhanced-geometry draw:mirror-horizontal="false" draw:mirror-vertical="false" svg:viewBox="0 0 0 0" draw:text-areas="?f5 ?f5 ?f6 ?f7" draw:type="ooxml-roundRect" draw:modifiers="2857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6" draw:style-name="gr119" draw:text-style-name="P3" draw:layer="layout" svg:width="3.554cm" svg:height="0.709cm" svg:x="12.827cm" svg:y="2.997cm">
          <text:p text:style-name="P2"><text:span text:style-name="T34">AVATAR SE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0" draw:text-style-name="P10" draw:layer="layout" svg:width="10.793cm" svg:height="1.395cm" svg:x="12.827cm" svg:y="3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1" draw:text-style-name="P32" draw:layer="layout" svg:width="2.792cm" svg:height="2.792cm" svg:x="13.208cm" svg:y="4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122" draw:text-style-name="P3" draw:layer="layout" svg:width="2.373cm" svg:height="1.5cm" svg:x="13.5cm" svg:y="7cm">
          <text:p text:style-name="P2"><text:span text:style-name="T35">avatar_1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21" draw:text-style-name="P32" draw:layer="layout" svg:width="2.792cm" svg:height="2.792cm" svg:x="17cm" svg:y="4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" draw:style-name="gr123" draw:text-style-name="P3" draw:layer="layout" svg:width="2.5cm" svg:height="0.968cm" svg:x="17.5cm" svg:y="7.24cm">
          <text:p text:style-name="P2"><text:span text:style-name="T35">avatar_2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21" draw:text-style-name="P32" draw:layer="layout" svg:width="2.792cm" svg:height="2.792cm" svg:x="20.708cm" svg:y="4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6" draw:style-name="gr124" draw:text-style-name="P3" draw:layer="layout" svg:width="2.993cm" svg:height="1.5cm" svg:x="20.5cm" svg:y="7cm">
          <text:p text:style-name="P2"><text:span text:style-name="T35">avatar_3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21" draw:text-style-name="P32" draw:layer="layout" svg:width="2.792cm" svg:height="2.792cm" svg:x="13.208cm" svg:y="8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9" draw:style-name="gr125" draw:text-style-name="P3" draw:layer="layout" svg:width="2.5cm" svg:height="1.5cm" svg:x="13.5cm" svg:y="11cm">
          <text:p text:style-name="P2"><text:span text:style-name="T35">avatar_4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21" draw:text-style-name="P32" draw:layer="layout" svg:width="2.792cm" svg:height="2.792cm" svg:x="17.208cm" svg:y="8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2" draw:style-name="gr126" draw:text-style-name="P3" draw:layer="layout" svg:width="2.5cm" svg:height="1.5cm" svg:x="17.5cm" svg:y="11cm">
          <text:p text:style-name="P2"><text:span text:style-name="T35">avatar_5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21" draw:text-style-name="P32" draw:layer="layout" svg:width="2.792cm" svg:height="2.792cm" svg:x="20.701cm" svg:y="8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5" draw:style-name="gr127" draw:text-style-name="P3" draw:layer="layout" svg:width="2.493cm" svg:height="1.5cm" svg:x="21cm" svg:y="11cm">
          <text:p text:style-name="P2"><text:span text:style-name="T35">avatar_6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8" draw:text-style-name="P28" draw:layer="layout" svg:width="2.791cm" svg:height="2.791cm" svg:x="13.209cm" svg:y="4.209cm">
          <draw:image xlink:href="Pictures/10000000000002AE0000029BBEAFE2A873AE4915.jpg" xlink:type="simple" xlink:show="embed" xlink:actuate="onLoad" draw:mime-type="image/jpeg">
            <text:p/>
          </draw:image>
        </draw:frame>
        <draw:frame draw:style-name="gr129" draw:text-style-name="P28" draw:layer="layout" svg:width="2.999cm" svg:height="3.062cm" svg:x="17cm" svg:y="4.208cm">
          <draw:image xlink:href="Pictures/100000000000028E000002ACAA792C29207240C5.jpg" xlink:type="simple" xlink:show="embed" xlink:actuate="onLoad" draw:mime-type="image/jpeg">
            <text:p/>
          </draw:image>
        </draw:frame>
        <draw:frame draw:style-name="gr130" draw:text-style-name="P28" draw:layer="layout" svg:width="2.912cm" svg:height="2.912cm" svg:x="20.708cm" svg:y="4.208cm">
          <draw:image xlink:href="Pictures/1000000000000293000002A820B346795D3D368D.jpg" xlink:type="simple" xlink:show="embed" xlink:actuate="onLoad" draw:mime-type="image/jpeg">
            <text:p/>
          </draw:image>
        </draw:frame>
        <draw:frame draw:style-name="gr131" draw:text-style-name="P28" draw:layer="layout" svg:width="3.046cm" svg:height="2.792cm" svg:x="13.209cm" svg:y="8.208cm">
          <draw:image xlink:href="Pictures/100000000000029B00000279FE9E6F667FE6D7AA.jpg" xlink:type="simple" xlink:show="embed" xlink:actuate="onLoad" draw:mime-type="image/jpeg">
            <text:p/>
          </draw:image>
        </draw:frame>
        <draw:frame draw:style-name="gr132" draw:text-style-name="P28" draw:layer="layout" svg:width="2.791cm" svg:height="2.792cm" svg:x="17.208cm" svg:y="8.208cm">
          <draw:image xlink:href="Pictures/10000000000002780000027BF0080E4229D9A3D7.jpg" xlink:type="simple" xlink:show="embed" xlink:actuate="onLoad" draw:mime-type="image/jpeg">
            <text:p/>
          </draw:image>
        </draw:frame>
        <draw:frame draw:style-name="gr133" draw:text-style-name="P28" draw:layer="layout" svg:width="2.792cm" svg:height="2.792cm" svg:x="20.701cm" svg:y="8.208cm">
          <draw:image xlink:href="Pictures/100000000000028D0000029971D85552222970C0.jpg" xlink:type="simple" xlink:show="embed" xlink:actuate="onLoad" draw:mime-type="image/jpeg">
            <text:p/>
          </draw:image>
        </draw:frame>
        <presentation:notes draw:style-name="dp2">
          <draw:page-thumbnail draw:name="PlaceHolder 1" draw:style-name="gr14" draw:layer="layout" svg:width="15.238cm" svg:height="8.571cm" svg:x="1.905cm" svg:y="3.175cm" draw:page-number="6" presentation:class="page"/>
          <draw:frame draw:name="PlaceHolder 2" presentation:style-name="pr1" draw:text-style-name="P6" draw:layer="layout" svg:width="15.238cm" svg:height="9.999cm" svg:x="1.905cm" svg:y="12.224cm" presentation:class="notes" presentation:user-transformed="true">
            <draw:text-box>
              <text:p text:style-name="P5"><text:span text:style-name="T6">Avatars are currently emoji (🦊🐻🦁🐯🐼🐨). To replace with images: create 6 PNGs in Canva (80×80px, circle-cropped), name avatar_1.png–avatar_6.png, place in assets/icons/avatars/. Then tell Antigravity to update profile.py to load CTkImage from those paths.</text:span></text:p>
            </draw:text-box>
          </draw:frame>
          <draw:frame draw:name="PlaceHolder 3" presentation:style-name="pr2" draw:text-style-name="P8" draw:layer="layout" svg:width="8.253cm" svg:height="1.272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 0" draw:style-name="gr134" draw:text-style-name="P10" draw:layer="layout" svg:width="22.858cm" svg:height="1.522cm" svg:x="1.27cm" svg:y="0.711cm">
          <text:p text:style-name="P9"><text:span text:style-name="T12">Tech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8" draw:text-style-name="P4" draw:layer="layout" svg:width="11.682cm" svg:height="4.951cm" svg:x="1.016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5" draw:text-style-name="P33" draw:layer="layout" svg:width="3.808cm" svg:height="0.709cm" svg:x="1.473cm" svg:y="3.073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" draw:style-name="gr136" draw:text-style-name="P3" draw:layer="layout" svg:width="3.808cm" svg:height="0.709cm" svg:x="1.473cm" svg:y="3.073cm">
          <text:p text:style-name="P2"><text:span text:style-name="T36">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" draw:text-style-name="P1" draw:layer="layout" svg:width="0.455cm" svg:height="0.455cm" svg:x="1.575cm" svg:y="4.191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4" draw:style-name="gr137" draw:text-style-name="P10" draw:layer="layout" svg:width="9.904cm" svg:height="0.633cm" svg:x="2.286cm" svg:y="4.14cm">
          <text:p text:style-name="P9"><text:span text:style-name="T37">PyQt5 5.15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0.455cm" svg:height="0.455cm" svg:x="1.575cm" svg:y="5.207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5" draw:style-name="gr138" draw:text-style-name="P10" draw:layer="layout" svg:width="9.904cm" svg:height="0.633cm" svg:x="2.286cm" svg:y="5.156cm">
          <text:p text:style-name="P9"><text:span text:style-name="T37">Pillow (image handl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0.455cm" svg:height="0.455cm" svg:x="1.575cm" svg:y="6.223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6" draw:style-name="gr139" draw:text-style-name="P10" draw:layer="layout" svg:width="9.904cm" svg:height="0.633cm" svg:x="2.286cm" svg:y="6.172cm">
          <text:p text:style-name="P9"><text:span text:style-name="T37">Matplotlib (embedded char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8" draw:text-style-name="P4" draw:layer="layout" svg:width="11.682cm" svg:height="4.951cm" svg:x="13.208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40" draw:text-style-name="P34" draw:layer="layout" svg:width="3.808cm" svg:height="0.709cm" svg:x="13.665cm" svg:y="3.073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9" draw:style-name="gr141" draw:text-style-name="P3" draw:layer="layout" svg:width="3.808cm" svg:height="0.709cm" svg:x="13.665cm" svg:y="3.073cm">
          <text:p text:style-name="P2"><text:span text:style-name="T38">AI / V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" draw:text-style-name="P1" draw:layer="layout" svg:width="0.455cm" svg:height="0.455cm" svg:x="13.767cm" svg:y="4.191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10" draw:style-name="gr142" draw:text-style-name="P10" draw:layer="layout" svg:width="9.904cm" svg:height="0.633cm" svg:x="14.478cm" svg:y="4.14cm">
          <text:p text:style-name="P9"><text:span text:style-name="T37">TensorFlow 2.12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1" draw:text-style-name="P1" draw:layer="layout" svg:width="0.455cm" svg:height="0.455cm" svg:x="13.767cm" svg:y="5.207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11" draw:style-name="gr143" draw:text-style-name="P10" draw:layer="layout" svg:width="9.904cm" svg:height="0.633cm" svg:x="14.478cm" svg:y="5.156cm">
          <text:p text:style-name="P9"><text:span text:style-name="T37">OpenCV (webcam + RO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1" draw:text-style-name="P1" draw:layer="layout" svg:width="0.455cm" svg:height="0.455cm" svg:x="13.767cm" svg:y="6.223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12" draw:style-name="gr144" draw:text-style-name="P10" draw:layer="layout" svg:width="9.904cm" svg:height="0.633cm" svg:x="14.478cm" svg:y="6.172cm">
          <text:p text:style-name="P9"><text:span text:style-name="T37">NumPy (preprocess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8" draw:text-style-name="P4" draw:layer="layout" svg:width="11.682cm" svg:height="4.951cm" svg:x="1.016cm" svg:y="8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45" draw:text-style-name="P35" draw:layer="layout" svg:width="3.808cm" svg:height="0.709cm" svg:x="1.473cm" svg:y="8.534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5" draw:style-name="gr146" draw:text-style-name="P3" draw:layer="layout" svg:width="3.808cm" svg:height="0.709cm" svg:x="1.473cm" svg:y="8.534cm">
          <text:p text:style-name="P2"><text:span text:style-name="T39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1" draw:text-style-name="P1" draw:layer="layout" svg:width="0.455cm" svg:height="0.455cm" svg:x="1.575cm" svg:y="9.652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16" draw:style-name="gr147" draw:text-style-name="P10" draw:layer="layout" svg:width="9.904cm" svg:height="0.633cm" svg:x="2.286cm" svg:y="9.601cm">
          <text:p text:style-name="P9"><text:span text:style-name="T37">gTTS (English + Urd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1" draw:text-style-name="P1" draw:layer="layout" svg:width="0.455cm" svg:height="0.455cm" svg:x="1.575cm" svg:y="10.668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17" draw:style-name="gr148" draw:text-style-name="P10" draw:layer="layout" svg:width="9.904cm" svg:height="0.633cm" svg:x="2.286cm" svg:y="10.617cm">
          <text:p text:style-name="P9"><text:span text:style-name="T37">pyttsx3 (offline fallb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1" draw:text-style-name="P1" draw:layer="layout" svg:width="0.455cm" svg:height="0.455cm" svg:x="1.575cm" svg:y="11.684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18" draw:style-name="gr149" draw:text-style-name="P10" draw:layer="layout" svg:width="9.904cm" svg:height="0.633cm" svg:x="2.286cm" svg:y="11.633cm">
          <text:p text:style-name="P9"><text:span text:style-name="T37">pygame (audio playb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8" draw:text-style-name="P4" draw:layer="layout" svg:width="11.682cm" svg:height="4.951cm" svg:x="13.208cm" svg:y="8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35" draw:text-style-name="P33" draw:layer="layout" svg:width="3.808cm" svg:height="0.709cm" svg:x="13.665cm" svg:y="8.534cm">
          <text:p/>
          <draw:enhanced-geometry draw:mirror-horizontal="false" draw:mirror-vertical="false" svg:viewBox="0 0 0 0" draw:text-areas="?f5 ?f5 ?f6 ?f7" draw:type="ooxml-roundRect" draw:modifiers="214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1" draw:style-name="gr150" draw:text-style-name="P3" draw:layer="layout" svg:width="3.808cm" svg:height="0.709cm" svg:x="13.665cm" svg:y="8.534cm">
          <text:p text:style-name="P2"><text:span text:style-name="T3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1" draw:text-style-name="P1" draw:layer="layout" svg:width="0.455cm" svg:height="0.455cm" svg:x="13.767cm" svg:y="9.652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22" draw:style-name="gr151" draw:text-style-name="P10" draw:layer="layout" svg:width="9.904cm" svg:height="0.633cm" svg:x="14.478cm" svg:y="9.601cm">
          <text:p text:style-name="P9"><text:span text:style-name="T37">SQLite + schema.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1" draw:text-style-name="P1" draw:layer="layout" svg:width="0.455cm" svg:height="0.455cm" svg:x="13.767cm" svg:y="10.668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23" draw:style-name="gr152" draw:text-style-name="P10" draw:layer="layout" svg:width="9.904cm" svg:height="0.633cm" svg:x="14.478cm" svg:y="10.617cm">
          <text:p text:style-name="P9"><text:span text:style-name="T37">bcrypt (password hash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1" draw:style-name="gr1" draw:text-style-name="P1" draw:layer="layout" svg:width="0.455cm" svg:height="0.455cm" svg:x="13.767cm" svg:y="11.684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24" draw:style-name="gr153" draw:text-style-name="P10" draw:layer="layout" svg:width="9.904cm" svg:height="0.633cm" svg:x="14.478cm" svg:y="11.633cm">
          <text:p text:style-name="P9"><text:span text:style-name="T37">deep-translator (Urd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4" draw:layer="layout" svg:width="15.238cm" svg:height="8.571cm" svg:x="1.905cm" svg:y="3.175cm" draw:page-number="7" presentation:class="page"/>
          <draw:frame draw:name="PlaceHolder 2" presentation:style-name="pr1" draw:text-style-name="P6" draw:layer="layout" svg:width="15.238cm" svg:height="9.999cm" svg:x="1.905cm" svg:y="12.224cm" presentation:class="notes" presentation:user-transformed="true">
            <draw:text-box>
              <text:p text:style-name="P5"><text:span text:style-name="T6">Full Python app — no web server or framework needed. Runs locally with `python main.py`. TensorFlow is optional; without the model file the app runs in simulation mode.</text:span></text:p>
            </draw:text-box>
          </draw:frame>
          <draw:frame draw:name="PlaceHolder 3" presentation:style-name="pr2" draw:text-style-name="P8" draw:layer="layout" svg:width="8.253cm" svg:height="1.272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8" draw:style-name="dp3" draw:master-page-name="Blank_20_Slide">
        <office:forms form:automatic-focus="false" form:apply-design-mode="false"/>
        <draw:custom-shape draw:name="Text 0" draw:style-name="gr154" draw:text-style-name="P10" draw:layer="layout" svg:width="22.858cm" svg:height="1.522cm" svg:x="1.27cm" svg:y="0.711cm">
          <text:p text:style-name="P9"><text:span text:style-name="T8">Known Issues &amp; 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7" draw:text-style-name="P11" draw:layer="layout" svg:width="11.428cm" svg:height="10.412cm" svg:x="1.016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63" draw:text-style-name="P25" draw:layer="layout" svg:width="3.554cm" svg:height="0.709cm" svg:x="1.524cm" svg:y="2.997cm">
          <text:p/>
          <draw:enhanced-geometry draw:mirror-horizontal="false" draw:mirror-vertical="false" svg:viewBox="0 0 0 0" draw:text-areas="?f5 ?f5 ?f6 ?f7" draw:type="ooxml-roundRect" draw:modifiers="2857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" draw:style-name="gr155" draw:text-style-name="P3" draw:layer="layout" svg:width="3.554cm" svg:height="0.709cm" svg:x="1.524cm" svg:y="2.997cm">
          <text:p text:style-name="P2"><text:span text:style-name="T18">ISSUES TO 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" draw:text-style-name="P1" draw:layer="layout" svg:width="0.455cm" svg:height="0.455cm" svg:x="1.524cm" svg:y="4.115cm">
          <draw:image xlink:href="Pictures/100000010000010000000100720426F89F398869.png" xlink:type="simple" xlink:show="embed" xlink:actuate="onLoad" draw:mime-type="image/png">
            <text:p/>
          </draw:image>
          <svg:desc>preencoded.png</svg:desc>
        </draw:frame>
        <draw:custom-shape draw:name="Text 4" draw:style-name="gr156" draw:text-style-name="P10" draw:layer="layout" svg:width="9.65cm" svg:height="0.709cm" svg:x="2.235cm" svg:y="4.064cm">
          <text:p text:style-name="P9"><text:span text:style-name="T40">Multi-screen / HiDPI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0.455cm" svg:height="0.455cm" svg:x="1.524cm" svg:y="5.004cm">
          <draw:image xlink:href="Pictures/100000010000010000000100720426F89F398869.png" xlink:type="simple" xlink:show="embed" xlink:actuate="onLoad" draw:mime-type="image/png">
            <text:p/>
          </draw:image>
          <svg:desc>preencoded.png</svg:desc>
        </draw:frame>
        <draw:custom-shape draw:name="Text 5" draw:style-name="gr157" draw:text-style-name="P10" draw:layer="layout" svg:width="9.65cm" svg:height="0.709cm" svg:x="2.235cm" svg:y="4.953cm">
          <text:p text:style-name="P9"><text:span text:style-name="T40">Monthly Master badge not yet ad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0.455cm" svg:height="0.455cm" svg:x="1.524cm" svg:y="5.893cm">
          <draw:image xlink:href="Pictures/100000010000010000000100720426F89F398869.png" xlink:type="simple" xlink:show="embed" xlink:actuate="onLoad" draw:mime-type="image/png">
            <text:p/>
          </draw:image>
          <svg:desc>preencoded.png</svg:desc>
        </draw:frame>
        <draw:custom-shape draw:name="Text 6" draw:style-name="gr158" draw:text-style-name="P10" draw:layer="layout" svg:width="9.65cm" svg:height="0.709cm" svg:x="2.235cm" svg:y="5.842cm">
          <text:p text:style-name="P9"><text:span text:style-name="T40">TTS lag on slower mach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" draw:text-style-name="P1" draw:layer="layout" svg:width="0.455cm" svg:height="0.455cm" svg:x="1.524cm" svg:y="6.782cm">
          <draw:image xlink:href="Pictures/100000010000010000000100720426F89F398869.png" xlink:type="simple" xlink:show="embed" xlink:actuate="onLoad" draw:mime-type="image/png">
            <text:p/>
          </draw:image>
          <svg:desc>preencoded.png</svg:desc>
        </draw:frame>
        <draw:custom-shape draw:name="Text 7" draw:style-name="gr159" draw:text-style-name="P10" draw:layer="layout" svg:width="9.65cm" svg:height="0.709cm" svg:x="2.235cm" svg:y="6.731cm">
          <text:p text:style-name="P9"><text:span text:style-name="T40">Leaderboard pagination for large user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1" draw:text-style-name="P1" draw:layer="layout" svg:width="0.455cm" svg:height="0.455cm" svg:x="1.524cm" svg:y="9.449cm">
          <draw:image xlink:href="Pictures/100000010000010000000100720426F89F398869.png" xlink:type="simple" xlink:show="embed" xlink:actuate="onLoad" draw:mime-type="image/png">
            <text:p/>
          </draw:image>
          <svg:desc>preencoded.png</svg:desc>
        </draw:frame>
        <draw:custom-shape draw:name="Text 10" draw:style-name="gr160" draw:text-style-name="P10" draw:layer="layout" svg:width="9.65cm" svg:height="0.709cm" svg:x="2.235cm" svg:y="9.398cm">
          <text:p text:style-name="P9"><text:span text:style-name="T40">monthly_master.png badge asset mi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1" draw:text-style-name="P1" draw:layer="layout" svg:width="0.455cm" svg:height="0.455cm" svg:x="1.524cm" svg:y="10.338cm">
          <draw:image xlink:href="Pictures/100000010000010000000100720426F89F398869.png" xlink:type="simple" xlink:show="embed" xlink:actuate="onLoad" draw:mime-type="image/png">
            <text:p/>
          </draw:image>
          <svg:desc>preencoded.png</svg:desc>
        </draw:frame>
        <draw:custom-shape draw:name="Text 11" draw:style-name="gr161" draw:text-style-name="P10" draw:layer="layout" svg:width="9.65cm" svg:height="0.709cm" svg:x="2.235cm" svg:y="10.287cm">
          <text:p text:style-name="P9"><text:span text:style-name="T40">Light theme not yet ported to PyQt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1" draw:text-style-name="P1" draw:layer="layout" svg:width="0.455cm" svg:height="0.455cm" svg:x="1.545cm" svg:y="7.745cm">
          <draw:image xlink:href="Pictures/100000010000010000000100720426F89F398869.png" xlink:type="simple" xlink:show="embed" xlink:actuate="onLoad" draw:mime-type="image/png">
            <text:p/>
          </draw:image>
          <svg:desc>preencoded.png</svg:desc>
        </draw:frame>
        <draw:custom-shape draw:name="Text 12" draw:style-name="gr162" draw:text-style-name="P10" draw:layer="layout" svg:width="9.65cm" svg:height="0.889cm" svg:x="2.235cm" svg:y="7.44cm">
          <text:p text:style-name="P9"><text:span text:style-name="T40">Camera permission pop-up on first lau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1" draw:text-style-name="P1" draw:layer="layout" svg:width="0.455cm" svg:height="0.455cm" svg:x="1.545cm" svg:y="8.545cm">
          <draw:image xlink:href="Pictures/100000010000010000000100720426F89F398869.png" xlink:type="simple" xlink:show="embed" xlink:actuate="onLoad" draw:mime-type="image/png">
            <text:p/>
          </draw:image>
          <svg:desc>preencoded.png</svg:desc>
        </draw:frame>
        <draw:custom-shape draw:name="Text 13" draw:style-name="gr163" draw:text-style-name="P10" draw:layer="layout" svg:width="9.65cm" svg:height="1.171cm" svg:x="2.235cm" svg:y="8.329cm">
          <text:p text:style-name="P9"><text:span text:style-name="T40">Urdu TTS needs internet; offline fallback lim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7" draw:text-style-name="P11" draw:layer="layout" svg:width="11.174cm" svg:height="10.412cm" svg:x="12.954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18" draw:text-style-name="P31" draw:layer="layout" svg:width="3.554cm" svg:height="0.709cm" svg:x="13.462cm" svg:y="2.997cm">
          <text:p/>
          <draw:enhanced-geometry draw:mirror-horizontal="false" draw:mirror-vertical="false" svg:viewBox="0 0 0 0" draw:text-areas="?f5 ?f5 ?f6 ?f7" draw:type="ooxml-roundRect" draw:modifiers="2857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6" draw:style-name="gr164" draw:text-style-name="P3" draw:layer="layout" svg:width="3.554cm" svg:height="0.709cm" svg:x="13.462cm" svg:y="2.997cm">
          <text:p text:style-name="P2"><text:span text:style-name="T34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65" draw:text-style-name="P36" draw:layer="layout" svg:width="0.455cm" svg:height="0.455cm" svg:x="13.462cm" svg:y="4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8" draw:style-name="gr166" draw:text-style-name="P10" draw:layer="layout" svg:width="9.396cm" svg:height="0.709cm" svg:x="14.173cm" svg:y="4.14cm">
          <text:p text:style-name="P9"><text:span text:style-name="T40">Complete badge &amp; avatar asset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65" draw:text-style-name="P36" draw:layer="layout" svg:width="0.455cm" svg:height="0.455cm" svg:x="13.462cm" svg:y="5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167" draw:text-style-name="P10" draw:layer="layout" svg:width="9.396cm" svg:height="0.709cm" svg:x="14.173cm" svg:y="5.232cm">
          <text:p text:style-name="P9"><text:span text:style-name="T40">Light theme via QSS stylesh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68" draw:text-style-name="P10" draw:layer="layout" svg:width="9.396cm" svg:height="0.709cm" svg:x="14.173cm" svg:y="6.325cm">
          <text:p text:style-name="P9"><text:span text:style-name="T40">Add digits 6–9 to Unit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69" draw:text-style-name="P37" draw:layer="layout" svg:width="0.455cm" svg:height="0.455cm" svg:x="13.5cm" svg:y="6.5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4" draw:style-name="gr170" draw:text-style-name="P10" draw:layer="layout" svg:width="9.396cm" svg:height="1.175cm" svg:x="14.173cm" svg:y="6.325cm">
          <text:p text:style-name="P9"><text:span text:style-name="T40">Expand Unit 2 common 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71" draw:text-style-name="P38" draw:layer="layout" svg:width="0.455cm" svg:height="0.455cm" svg:x="13.5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6" draw:style-name="gr172" draw:text-style-name="P10" draw:layer="layout" svg:width="9.396cm" svg:height="0.5cm" svg:x="14.173cm" svg:y="8cm">
          <text:p text:style-name="P9"><text:span text:style-name="T40">Port light theme to QSS stylesh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71" draw:text-style-name="P38" draw:layer="layout" svg:width="0.455cm" svg:height="0.455cm" svg:x="13.5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8" draw:style-name="gr173" draw:text-style-name="P10" draw:layer="layout" svg:width="9.396cm" svg:height="1.5cm" svg:x="14.173cm" svg:y="8.5cm">
          <text:p text:style-name="P9"><text:span text:style-name="T40">Add more quiz question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74" draw:text-style-name="P39" draw:layer="layout" svg:width="0.455cm" svg:height="0.455cm" svg:x="13.5cm" svg:y="1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0" draw:style-name="gr175" draw:text-style-name="P10" draw:layer="layout" svg:width="9.396cm" svg:height="1.5cm" svg:x="14.173cm" svg:y="9.5cm">
          <text:p text:style-name="P9"><text:span text:style-name="T40">Speed up model i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74" draw:text-style-name="P39" draw:layer="layout" svg:width="0.455cm" svg:height="0.455cm" svg:x="13.5cm" svg:y="11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2" draw:style-name="gr176" draw:text-style-name="P10" draw:layer="layout" svg:width="9.396cm" svg:height="0.5cm" svg:x="14.173cm" svg:y="11cm">
          <text:p text:style-name="P9"><text:span text:style-name="T40">Package as standalone .exe / .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4" draw:layer="layout" svg:width="15.238cm" svg:height="8.571cm" svg:x="1.905cm" svg:y="3.175cm" draw:page-number="8" presentation:class="page"/>
          <draw:frame draw:name="PlaceHolder 2" presentation:style-name="pr1" draw:text-style-name="P6" draw:layer="layout" svg:width="15.238cm" svg:height="9.999cm" svg:x="1.905cm" svg:y="12.224cm" presentation:class="notes" presentation:user-transformed="true">
            <draw:text-box>
              <text:p text:style-name="P5"><text:span text:style-name="T6">These are the issues from the problems.odt file. Prioritise: images (badges, avatars, signs) and data loading fixes first, then UI polish.</text:span></text:p>
            </draw:text-box>
          </draw:frame>
          <draw:frame draw:name="PlaceHolder 3" presentation:style-name="pr2" draw:text-style-name="P8" draw:layer="layout" svg:width="8.253cm" svg:height="1.272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 0" draw:style-name="gr177" draw:text-style-name="P10" draw:layer="layout" svg:width="22.858cm" svg:height="1.522cm" svg:x="1.27cm" svg:y="0.711cm">
          <text:p text:style-name="P9"><text:span text:style-name="T12">Adding Images with Can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8" draw:text-style-name="P4" draw:layer="layout" svg:width="7.618cm" svg:height="10.539cm" svg:x="1.016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78" draw:text-style-name="P40" draw:layer="layout" svg:width="1.395cm" svg:height="1.395cm" svg:x="1.524cm" svg:y="3.0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" draw:style-name="gr179" draw:text-style-name="P3" draw:layer="layout" svg:width="1.395cm" svg:height="1.395cm" svg:x="1.524cm" svg:y="3.099cm">
          <text:p text:style-name="P2"><text:span text:style-name="T4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80" draw:text-style-name="P10" draw:layer="layout" svg:width="6.856cm" svg:height="1.217cm" svg:x="1.524cm" svg:y="4.775cm">
          <text:p text:style-name="P9"><text:span text:style-name="T42">Sign Reference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" draw:text-style-name="P1" draw:layer="layout" svg:width="0.455cm" svg:height="0.455cm" svg:x="1.575cm" svg:y="6.35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5" draw:style-name="gr181" draw:text-style-name="P10" draw:layer="layout" svg:width="6.094cm" svg:height="1.372cm" svg:x="2.286cm" svg:y="5.992cm">
          <text:p text:style-name="P9"><text:span text:style-name="T5">A–Z sign images (A.png–Z.png) are included in assets/sign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0.455cm" svg:height="0.455cm" svg:x="1.575cm" svg:y="7.747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6" draw:style-name="gr182" draw:text-style-name="P10" draw:layer="layout" svg:width="6.094cm" svg:height="1.065cm" svg:x="2.286cm" svg:y="7.696cm">
          <text:p text:style-name="P9"><text:span text:style-name="T5">To add new signs: create 200×200 px PNG, name as the sign l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0.455cm" svg:height="0.455cm" svg:x="1.575cm" svg:y="9.435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7" draw:style-name="gr183" draw:text-style-name="P10" draw:layer="layout" svg:width="6.094cm" svg:height="1.065cm" svg:x="2.286cm" svg:y="9.093cm">
          <text:p text:style-name="P9"><text:span text:style-name="T5">Export as PNG — name A.png, B.png … Z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" draw:text-style-name="P1" draw:layer="layout" svg:width="0.455cm" svg:height="0.455cm" svg:x="1.575cm" svg:y="10.545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8" draw:style-name="gr184" draw:text-style-name="P10" draw:layer="layout" svg:width="6.094cm" svg:height="1.342cm" draw:transform="skewX (0.0958185759344887) translate (2.318cm 10.158cm)">
          <text:p text:style-name="P9"><text:span text:style-name="T5">Place in signbridge/assets/sign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8" draw:text-style-name="P4" draw:layer="layout" svg:width="7.618cm" svg:height="10.539cm" svg:x="9.017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85" draw:text-style-name="P41" draw:layer="layout" svg:width="1.395cm" svg:height="1.395cm" svg:x="9.525cm" svg:y="3.0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186" draw:text-style-name="P3" draw:layer="layout" svg:width="1.395cm" svg:height="1.395cm" svg:x="9.525cm" svg:y="3.099cm">
          <text:p text:style-name="P2"><text:span text:style-name="T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87" draw:text-style-name="P10" draw:layer="layout" svg:width="6.856cm" svg:height="1.217cm" svg:x="9.525cm" svg:y="4.775cm">
          <text:p text:style-name="P9"><text:span text:style-name="T42">Badge Icons (7 badg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1" draw:text-style-name="P1" draw:layer="layout" svg:width="0.455cm" svg:height="0.455cm" svg:x="9.576cm" svg:y="6.35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13" draw:style-name="gr188" draw:text-style-name="P10" draw:layer="layout" svg:width="6.094cm" svg:height="1.372cm" svg:x="10.287cm" svg:y="5.992cm">
          <text:p text:style-name="P9"><text:span text:style-name="T5">Create 7 designs — 80×80 px e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1" draw:text-style-name="P1" draw:layer="layout" svg:width="0.455cm" svg:height="0.455cm" svg:x="9.545cm" svg:y="8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14" draw:style-name="gr189" draw:text-style-name="P10" draw:layer="layout" svg:width="6.094cm" svg:height="1.065cm" svg:x="10.287cm" svg:y="7.696cm">
          <text:p text:style-name="P9"><text:span text:style-name="T5">Suggested icons: flame, fist, medal, A-Z, cap, globe,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1" draw:text-style-name="P1" draw:layer="layout" svg:width="0.455cm" svg:height="0.455cm" svg:x="9.286cm" svg:y="9.37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15" draw:style-name="gr190" draw:text-style-name="P10" draw:layer="layout" svg:width="6.094cm" svg:height="1.065cm" svg:x="10.287cm" svg:y="9.093cm">
          <text:p text:style-name="P9"><text:span text:style-name="T5">Export as PNG — name first_sign.png, streak_7.png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1" draw:text-style-name="P1" draw:layer="layout" svg:width="0.455cm" svg:height="0.455cm" svg:x="9.576cm" svg:y="10.541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16" draw:style-name="gr191" draw:text-style-name="P10" draw:layer="layout" svg:width="6.094cm" svg:height="1.065cm" svg:x="10.287cm" svg:y="10.49cm">
          <text:p text:style-name="P9"><text:span text:style-name="T5">Place in signbridge/assets/icons/badge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28" draw:text-style-name="P4" draw:layer="layout" svg:width="7.618cm" svg:height="10.539cm" svg:x="17.018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92" draw:text-style-name="P42" draw:layer="layout" svg:width="1.395cm" svg:height="1.395cm" svg:x="17.526cm" svg:y="3.0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193" draw:text-style-name="P3" draw:layer="layout" svg:width="1.395cm" svg:height="1.395cm" svg:x="17.526cm" svg:y="3.099cm">
          <text:p text:style-name="P2"><text:span text:style-name="T4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94" draw:text-style-name="P10" draw:layer="layout" svg:width="6.856cm" svg:height="1.217cm" svg:x="17.526cm" svg:y="4.775cm">
          <text:p text:style-name="P9"><text:span text:style-name="T42">Avatar Images (6 avata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1" draw:text-style-name="P1" draw:layer="layout" svg:width="0.455cm" svg:height="0.455cm" svg:x="17.577cm" svg:y="6.35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21" draw:style-name="gr195" draw:text-style-name="P10" draw:layer="layout" svg:width="6.094cm" svg:height="1.372cm" svg:x="18.288cm" svg:y="5.992cm">
          <text:p text:style-name="P9"><text:span text:style-name="T5">Create 6 character/illustration desig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1" draw:text-style-name="P1" draw:layer="layout" svg:width="0.455cm" svg:height="0.455cm" svg:x="17.512cm" svg:y="7.844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22" draw:style-name="gr196" draw:text-style-name="P10" draw:layer="layout" svg:width="6.094cm" svg:height="1.065cm" svg:x="18.288cm" svg:y="7.696cm">
          <text:p text:style-name="P9"><text:span text:style-name="T5">80×80 px, circle-crop before ex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1" draw:text-style-name="P1" draw:layer="layout" svg:width="0.455cm" svg:height="0.455cm" svg:x="17.577cm" svg:y="9.144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23" draw:style-name="gr197" draw:text-style-name="P10" draw:layer="layout" svg:width="6.094cm" svg:height="1.065cm" svg:x="18.288cm" svg:y="9.093cm">
          <text:p text:style-name="P9"><text:span text:style-name="T5">Export as PNG — name avatar_1.png … avatar_6.png (6 includ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1" draw:style-name="gr1" draw:text-style-name="P1" draw:layer="layout" svg:width="0.455cm" svg:height="0.455cm" svg:x="17.545cm" svg:y="10.896cm">
          <draw:image xlink:href="Pictures/10000001000001000000010010E334B4FEFCDDCA.png" xlink:type="simple" xlink:show="embed" xlink:actuate="onLoad" draw:mime-type="image/png">
            <text:p/>
          </draw:image>
          <svg:desc>preencoded.png</svg:desc>
        </draw:frame>
        <draw:custom-shape draw:name="Text 24" draw:style-name="gr198" draw:text-style-name="P10" draw:layer="layout" svg:width="6.094cm" svg:height="1.065cm" svg:x="18.288cm" svg:y="10.49cm">
          <text:p text:style-name="P9"><text:span text:style-name="T5">Place in signbridge/assets/icons/avatar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4" draw:layer="layout" svg:width="15.238cm" svg:height="8.571cm" svg:x="1.905cm" svg:y="3.175cm" draw:page-number="9" presentation:class="page"/>
          <draw:frame draw:name="PlaceHolder 2" presentation:style-name="pr1" draw:text-style-name="P6" draw:layer="layout" svg:width="15.238cm" svg:height="9.999cm" svg:x="1.905cm" svg:y="12.224cm" presentation:class="notes" presentation:user-transformed="true">
            <draw:text-box>
              <text:p text:style-name="P5"><text:span text:style-name="T6">After placing the image files, tell Antigravity: 'Update the app to load badge images from assets/icons/badges/ and avatar images from assets/icons/avatars/ using CTkImage.' It will update badge_engine.py and profile.py for you.</text:span></text:p>
            </draw:text-box>
          </draw:frame>
          <draw:frame draw:name="PlaceHolder 3" presentation:style-name="pr2" draw:text-style-name="P8" draw:layer="layout" svg:width="8.253cm" svg:height="1.272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Text 0" draw:style-name="gr199" draw:text-style-name="P10" draw:layer="layout" svg:width="22.858cm" svg:height="0.789cm" svg:x="1.27cm" svg:y="0.711cm">
          <text:p text:style-name="P9"><text:span text:style-name="T8">How to Run Sign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00" draw:text-style-name="P11" draw:layer="layout" svg:width="23.366cm" svg:height="1.999cm" svg:x="1.016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01" draw:text-style-name="P40" draw:layer="layout" svg:width="1.217cm" svg:height="1.217cm" svg:x="1.473cm" svg:y="2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" draw:style-name="gr202" draw:text-style-name="P3" draw:layer="layout" svg:width="1.217cm" svg:height="1.217cm" svg:x="1.473cm" svg:y="2.5cm">
          <text:p text:style-name="P2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03" draw:text-style-name="P10" draw:layer="layout" svg:width="2.792cm" svg:height="1cm" svg:x="2.997cm" svg:y="2cm">
          <text:p text:style-name="P9"><text:span text:style-name="T46">Ex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04" draw:text-style-name="P10" draw:layer="layout" svg:width="6.602cm" svg:height="0.5cm" svg:x="2.997cm" svg:y="3cm">
          <text:p text:style-name="P9"><text:span text:style-name="T47">Unzip the project and enter the fol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05" draw:text-style-name="P29" draw:layer="layout" svg:width="13.968cm" svg:height="1.395cm" svg:x="10cm" svg:y="2.105cm">
          <text:p/>
          <draw:enhanced-geometry draw:mirror-horizontal="false" draw:mirror-vertical="false" svg:viewBox="0 0 0 0" draw:text-areas="?f5 ?f5 ?f6 ?f7" draw:type="ooxml-roundRect" draw:modifiers="127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7" draw:style-name="gr206" draw:text-style-name="P10" draw:layer="layout" svg:width="11.993cm" svg:height="0.5cm" svg:x="11.5cm" svg:y="2.5cm">
          <text:p text:style-name="P9"><text:span text:style-name="T48">unzip signbridge_pyqt.zip &amp;&amp; cd signbridge_pyq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07" draw:text-style-name="P11" draw:layer="layout" svg:width="23.366cm" svg:height="2.389cm" svg:x="1.016cm" svg:y="4.1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78" draw:text-style-name="P40" draw:layer="layout" svg:width="1.217cm" svg:height="1.217cm" svg:x="1.347cm" svg:y="4.5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208" draw:text-style-name="P3" draw:layer="layout" svg:width="1.027cm" svg:height="1.217cm" svg:x="1.473cm" svg:y="4.566cm">
          <text:p text:style-name="P2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09" draw:text-style-name="P10" draw:layer="layout" svg:width="2.792cm" svg:height="0.5cm" svg:x="2.997cm" svg:y="4.5cm">
          <text:p text:style-name="P9"><text:span text:style-name="T46">Inst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10" draw:text-style-name="P10" draw:layer="layout" svg:width="6.602cm" svg:height="2cm" svg:x="2.997cm" svg:y="4.5cm">
          <text:p text:style-name="P9"><text:span text:style-name="T47">Install all Python dependencies (on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05" draw:text-style-name="P29" draw:layer="layout" svg:width="13.968cm" svg:height="1.395cm" svg:x="10.032cm" svg:y="4.605cm">
          <text:p/>
          <draw:enhanced-geometry draw:mirror-horizontal="false" draw:mirror-vertical="false" svg:viewBox="0 0 0 0" draw:text-areas="?f5 ?f5 ?f6 ?f7" draw:type="ooxml-roundRect" draw:modifiers="127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4" draw:style-name="gr211" draw:text-style-name="P10" draw:layer="layout" svg:width="8cm" svg:height="0.5cm" svg:x="12.5cm" svg:y="5cm">
          <text:p text:style-name="P9"><text:span text:style-name="T48">pip install -r requirements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1" draw:layer="layout" svg:width="23.366cm" svg:height="2.233cm" svg:x="1cm" svg:y="6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78" draw:text-style-name="P40" draw:layer="layout" svg:width="1.217cm" svg:height="1.217cm" svg:x="1.5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212" draw:text-style-name="P3" draw:layer="layout" svg:width="1.217cm" svg:height="1.217cm" svg:x="1.473cm" svg:y="7cm">
          <text:p text:style-name="P2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13" draw:text-style-name="P10" draw:layer="layout" svg:width="2.792cm" svg:height="0.733cm" svg:x="2.997cm" svg:y="6.767cm">
          <text:p text:style-name="P9"><text:span text:style-name="T46">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14" draw:text-style-name="P10" draw:layer="layout" svg:width="6.602cm" svg:height="1cm" svg:x="2.997cm" svg:y="7.5cm">
          <text:p text:style-name="P9"><text:span text:style-name="T47">Launch the app — DB creates itself automatic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05" draw:text-style-name="P29" draw:layer="layout" svg:width="13.968cm" svg:height="1.395cm" svg:x="10cm" svg:y="7.105cm">
          <text:p/>
          <draw:enhanced-geometry draw:mirror-horizontal="false" draw:mirror-vertical="false" svg:viewBox="0 0 0 0" draw:text-areas="?f5 ?f5 ?f6 ?f7" draw:type="ooxml-roundRect" draw:modifiers="127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1" draw:style-name="gr215" draw:text-style-name="P10" draw:layer="layout" svg:width="6cm" svg:height="0.5cm" svg:x="14.5cm" svg:y="7.5cm">
          <text:p text:style-name="P9"><text:span text:style-name="T48">python main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7" draw:text-style-name="P11" draw:layer="layout" svg:width="23.366cm" svg:height="2.233cm" svg:x="1cm" svg:y="9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78" draw:text-style-name="P40" draw:layer="layout" svg:width="1.217cm" svg:height="1.217cm" svg:x="1.5cm" svg:y="9.7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4" draw:style-name="gr216" draw:text-style-name="P3" draw:layer="layout" svg:width="1.217cm" svg:height="1.217cm" svg:x="1.473cm" svg:y="9.783cm">
          <text:p text:style-name="P2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17" draw:text-style-name="P10" draw:layer="layout" svg:width="2.792cm" svg:height="1.233cm" svg:x="2.997cm" svg:y="9.267cm">
          <text:p text:style-name="P9"><text:span text:style-name="T46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18" draw:text-style-name="P10" draw:layer="layout" svg:width="6.602cm" svg:height="1.5cm" svg:x="2.997cm" svg:y="10cm">
          <text:p text:style-name="P9"><text:span text:style-name="T47">Then login — streaks and XP start 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205" draw:text-style-name="P29" draw:layer="layout" svg:width="13.968cm" svg:height="1.395cm" svg:x="10cm" svg:y="9.605cm">
          <text:p/>
          <draw:enhanced-geometry draw:mirror-horizontal="false" draw:mirror-vertical="false" svg:viewBox="0 0 0 0" draw:text-areas="?f5 ?f5 ?f6 ?f7" draw:type="ooxml-roundRect" draw:modifiers="127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28" draw:style-name="gr219" draw:text-style-name="P10" draw:layer="layout" svg:width="11.493cm" svg:height="1.395cm" svg:x="12cm" svg:y="9.605cm">
          <text:p text:style-name="P9"><text:span text:style-name="T48">Create account on the Register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220" draw:text-style-name="P22" draw:layer="layout" svg:width="23.366cm" svg:height="1.8cm" svg:x="1cm" svg:y="11.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30" draw:style-name="gr221" draw:text-style-name="P10" draw:layer="layout" svg:width="22.35cm" svg:height="1cm" svg:x="1.649cm" svg:y="12cm">
          <text:p text:style-name="P9"><text:span text:style-name="T49">No GPU needed <text:s/>— app runs in mock mode without the model file. Use 'Simulate Success' to test Practice and Quiz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4" draw:layer="layout" svg:width="15.238cm" svg:height="8.571cm" svg:x="1.905cm" svg:y="3.175cm" draw:page-number="10" presentation:class="page"/>
          <draw:frame draw:name="PlaceHolder 2" presentation:style-name="pr1" draw:text-style-name="P6" draw:layer="layout" svg:width="15.238cm" svg:height="9.999cm" svg:x="1.905cm" svg:y="12.224cm" presentation:class="notes" presentation:user-transformed="true">
            <draw:text-box>
              <text:p text:style-name="P5"><text:span text:style-name="T6">The TensorFlow GPU warnings in the terminal are harmless — they just mean you don't have an NVIDIA GPU. The app uses CPU and still works fine.</text:span></text:p>
            </draw:text-box>
          </draw:frame>
          <draw:frame draw:name="PlaceHolder 3" presentation:style-name="pr2" draw:text-style-name="P8" draw:layer="layout" svg:width="8.253cm" svg:height="1.272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Shape 0" draw:style-name="gr222" draw:text-style-name="P43" draw:layer="layout" svg:width="8.888cm" svg:height="8.888cm" svg:x="-2.032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23" draw:text-style-name="P44" draw:layer="layout" svg:width="7.618cm" svg:height="7.618cm" svg:x="21.59cm" svg:y="-2.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" draw:text-style-name="P1" draw:layer="layout" svg:width="3.808cm" svg:height="3.808cm" svg:x="10.795cm" svg:y="2.286cm">
          <draw:image xlink:href="Pictures/10000001000001000000010070394E3BB4278C0C.png" xlink:type="simple" xlink:show="embed" xlink:actuate="onLoad" draw:mime-type="image/png">
            <text:p/>
          </draw:image>
          <svg:desc>preencoded.png</svg:desc>
        </draw:frame>
        <draw:custom-shape draw:name="Text 2" draw:style-name="gr224" draw:text-style-name="P3" draw:layer="layout" svg:width="22.858cm" svg:height="2.157cm" svg:x="1.27cm" svg:y="6.223cm">
          <text:p text:style-name="P2"><text:span text:style-name="T50">Sign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25" draw:text-style-name="P3" draw:layer="layout" svg:width="22.858cm" svg:height="1.141cm" svg:x="1.27cm" svg:y="8.433cm">
          <text:p text:style-name="P2"><text:span text:style-name="T51">Bridge the gap, one sign at a ti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5" draw:text-style-name="P4" draw:layer="layout" svg:width="4.57cm" svg:height="2.081cm" svg:x="2.54cm" svg:y="10.668cm">
          <text:p/>
          <draw:enhanced-geometry draw:mirror-horizontal="false" draw:mirror-vertical="false" svg:viewBox="0 0 0 0" draw:text-areas="?f5 ?f5 ?f6 ?f7" draw:type="ooxml-roundRect" draw:modifiers="1219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5" draw:style-name="gr226" draw:text-style-name="P3" draw:layer="layout" svg:width="4.57cm" svg:height="0.963cm" svg:x="2.54cm" svg:y="10.77cm">
          <text:p text:style-name="P2"><text:span text:style-name="T52">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27" draw:text-style-name="P3" draw:layer="layout" svg:width="4.57cm" svg:height="0.709cm" svg:x="2.54cm" svg:y="11.684cm">
          <text:p text:style-name="P2"><text:span text:style-name="T53">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5" draw:text-style-name="P4" draw:layer="layout" svg:width="4.57cm" svg:height="2.081cm" svg:x="7.874cm" svg:y="10.668cm">
          <text:p/>
          <draw:enhanced-geometry draw:mirror-horizontal="false" draw:mirror-vertical="false" svg:viewBox="0 0 0 0" draw:text-areas="?f5 ?f5 ?f6 ?f7" draw:type="ooxml-roundRect" draw:modifiers="1219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8" draw:style-name="gr228" draw:text-style-name="P3" draw:layer="layout" svg:width="4.57cm" svg:height="0.963cm" svg:x="7.874cm" svg:y="10.77cm">
          <text:p text:style-name="P2"><text:span text:style-name="T52">SQL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9" draw:text-style-name="P3" draw:layer="layout" svg:width="4.57cm" svg:height="0.709cm" svg:x="7.874cm" svg:y="11.684cm">
          <text:p text:style-name="P2"><text:span text:style-name="T53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4" draw:layer="layout" svg:width="4.57cm" svg:height="2.081cm" svg:x="13.208cm" svg:y="10.668cm">
          <text:p/>
          <draw:enhanced-geometry draw:mirror-horizontal="false" draw:mirror-vertical="false" svg:viewBox="0 0 0 0" draw:text-areas="?f5 ?f5 ?f6 ?f7" draw:type="ooxml-roundRect" draw:modifiers="1219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1" draw:style-name="gr230" draw:text-style-name="P3" draw:layer="layout" svg:width="4.57cm" svg:height="0.963cm" svg:x="13.208cm" svg:y="10.77cm">
          <text:p text:style-name="P2"><text:span text:style-name="T52">Tensor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31" draw:text-style-name="P3" draw:layer="layout" svg:width="4.57cm" svg:height="0.709cm" svg:x="13.208cm" svg:y="11.684cm">
          <text:p text:style-name="P2"><text:span text:style-name="T53">AI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5" draw:text-style-name="P4" draw:layer="layout" svg:width="4.57cm" svg:height="2.081cm" svg:x="18.542cm" svg:y="10.668cm">
          <text:p/>
          <draw:enhanced-geometry draw:mirror-horizontal="false" draw:mirror-vertical="false" svg:viewBox="0 0 0 0" draw:text-areas="?f5 ?f5 ?f6 ?f7" draw:type="ooxml-roundRect" draw:modifiers="1219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4" draw:style-name="gr232" draw:text-style-name="P3" draw:layer="layout" svg:width="4.57cm" svg:height="0.963cm" svg:x="18.542cm" svg:y="10.77cm">
          <text:p text:style-name="P2"><text:span text:style-name="T52">PyQt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33" draw:text-style-name="P3" draw:layer="layout" svg:width="4.57cm" svg:height="0.709cm" svg:x="18.542cm" svg:y="11.684cm">
          <text:p text:style-name="P2"><text:span text:style-name="T53">UI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4" draw:layer="layout" svg:width="15.238cm" svg:height="8.571cm" svg:x="1.905cm" svg:y="3.175cm" draw:page-number="11" presentation:class="page"/>
          <draw:frame draw:name="PlaceHolder 2" presentation:style-name="pr2" draw:text-style-name="P8" draw:layer="layout" svg:width="8.253cm" svg:height="1.272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6-26T11:38:29</meta:creation-date>
    <meta:initial-creator>PptxGenJS</meta:initial-creator>
    <dc:language>en-GB</dc:language>
    <dc:date>2026-06-30T12:40:09.022949987</dc:date>
    <meta:editing-cycles>10</meta:editing-cycles>
    <dc:subject>PptxGenJS Presentation</dc:subject>
    <dc:title>SignBridge — ASL Learning Platform</dc:title>
    <meta:editing-duration>PT31M1S</meta:editing-duration>
    <meta:generator>LibreOffice/7.3.7.2$Linux_X86_64 LibreOffice_project/30$Build-2</meta:generator>
    <meta:document-statistic meta:object-count="407"/>
    <meta:user-defined meta:name="AppVersion">15.0000</meta:user-defined>
    <meta:user-defined meta:name="Company">PptxGenJS</meta:user-defined>
    <meta:user-defined meta:name="Notes" meta:value-type="float">11</meta:user-defined>
    <meta:user-defined meta:name="PresentationFormat">On-screen Show (16:9)</meta:user-defined>
    <meta:user-defined meta:name="Slides" meta:value-type="float">11</meta:user-defined>
  </office:meta>
</office:document-meta>
</file>